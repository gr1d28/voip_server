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2A000000DAC1BC844E.jpg" manifest:media-type="image/jpeg"/>
  <manifest:file-entry manifest:full-path="Pictures/10000001000002E700000142ACDD35BD.png" manifest:media-type="image/png"/>
  <manifest:file-entry manifest:full-path="Pictures/1000000100000237000001E7E6C61E61.png" manifest:media-type="image/png"/>
  <manifest:file-entry manifest:full-path="Pictures/1000000100000237000001E70BEA50CA.png" manifest:media-type="image/png"/>
  <manifest:file-entry manifest:full-path="Pictures/100000000000027900000150877A9E29.jpg" manifest:media-type="image/jpeg"/>
  <manifest:file-entry manifest:full-path="Pictures/10000000000002F80000015F8C488DF0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Жирный" style:font-family-generic="roman"/>
    <style:font-face style:name="Times new Roman" svg:font-family="'Times new Roman'" style:font-adornments="Жирный" style:font-family-generic="roman"/>
    <style:font-face style:name="Times new Roman1" svg:font-family="'Times new Roman'" style:font-adornments="Обычный" style:font-family-generic="roman"/>
  </office:font-face-decls>
  <office:automatic-styles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2.549cm" style:rel-column-width="9825*"/>
    </style:style>
    <style:style style:name="Таблица2.B" style:family="table-column">
      <style:table-column-properties style:column-width="8.784cm" style:rel-column-width="33862*"/>
    </style:style>
    <style:style style:name="Таблица2.C" style:family="table-column">
      <style:table-column-properties style:column-width="5.667cm" style:rel-column-width="21848*"/>
    </style:style>
    <style:style style:name="Таблица2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Таблица2.C1" style:family="table-cell">
      <style:table-cell-properties fo:padding="0.049cm" fo:border="0.05pt solid #000000" style:writing-mode="page"/>
    </style:style>
    <style:style style:name="Таблица2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Таблица2.C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Таблица2.4" style:family="table-row">
      <style:table-row-properties style:min-row-height="0.474cm"/>
    </style:style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3.891cm" style:rel-column-width="15000*"/>
    </style:style>
    <style:style style:name="Таблица1.B" style:family="table-column">
      <style:table-column-properties style:column-width="7.442cm" style:rel-column-width="28687*"/>
    </style:style>
    <style:style style:name="Таблица1.C" style:family="table-column">
      <style:table-column-properties style:column-width="5.667cm" style:rel-column-width="21848*"/>
    </style:style>
    <style:style style:name="Таблица1.A1" style:family="table-cell">
      <style:table-cell-properties style:vertical-align="" fo:padding="0.049cm" fo:border-left="0.05pt solid #000000" fo:border-right="none" fo:border-top="0.05pt solid #000000" fo:border-bottom="0.05pt solid #000000" style:writing-mode="page"/>
    </style:style>
    <style:style style:name="Таблица1.B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Таблица1.C1" style:family="table-cell">
      <style:table-cell-properties fo:padding="0.049cm" fo:border="0.05pt solid #000000" style:writing-mode="page"/>
    </style:style>
    <style:style style:name="Таблица1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Таблица1.B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Таблица1.C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Таблица1.A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Таблица1.B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Таблица1.C3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Таблица1.A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Таблица1.B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Таблица1.C4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Таблица1.A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Таблица1.B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Таблица1.C5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4.136cm" style:rel-column-width="15945*"/>
    </style:style>
    <style:style style:name="Таблица3.B" style:family="table-column">
      <style:table-column-properties style:column-width="12.864cm" style:rel-column-width="49590*"/>
    </style:style>
    <style:style style:name="Таблица3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Таблица3.B1" style:family="table-cell">
      <style:table-cell-properties fo:padding="0.049cm" fo:border="0.05pt solid #000000" style:writing-mode="page"/>
    </style:style>
    <style:style style:name="Таблица3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Таблица3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P1" style:family="paragraph" style:parent-style-name="Standard" style:master-page-name="First_20_Page">
      <style:paragraph-properties fo:text-align="center" style:justify-single-word="false" style:page-number="auto"/>
      <style:text-properties officeooo:rsid="000032d8" officeooo:paragraph-rsid="00050e69"/>
    </style:style>
    <style:style style:name="P2" style:family="paragraph" style:parent-style-name="Standard">
      <style:paragraph-properties fo:text-align="center" style:justify-single-word="false"/>
      <style:text-properties officeooo:rsid="0003783d" officeooo:paragraph-rsid="00050e69"/>
    </style:style>
    <style:style style:name="P3" style:family="paragraph" style:parent-style-name="Standard">
      <style:paragraph-properties fo:text-align="center" style:justify-single-word="false"/>
      <style:text-properties officeooo:rsid="000032d8" officeooo:paragraph-rsid="00050e69"/>
    </style:style>
    <style:style style:name="P4" style:family="paragraph" style:parent-style-name="Standard">
      <style:paragraph-properties fo:margin-left="8.754cm" fo:text-align="justify" style:justify-single-word="false" fo:text-indent="0cm" style:auto-text-indent="false"/>
      <style:text-properties officeooo:rsid="000032d8" officeooo:paragraph-rsid="00050e69"/>
    </style:style>
    <style:style style:name="P5" style:family="paragraph" style:parent-style-name="Standard">
      <style:paragraph-properties fo:margin-left="8.754cm" fo:text-align="justify" style:justify-single-word="false" fo:text-indent="0cm" style:auto-text-indent="false"/>
      <style:text-properties officeooo:rsid="00050e69" officeooo:paragraph-rsid="00050e69"/>
    </style:style>
    <style:style style:name="P6" style:family="paragraph" style:parent-style-name="Standard">
      <style:paragraph-properties fo:text-align="end" style:justify-single-word="false"/>
      <style:text-properties officeooo:rsid="000032d8" officeooo:paragraph-rsid="00050e69"/>
    </style:style>
    <style:style style:name="P7" style:family="paragraph" style:parent-style-name="Standard">
      <style:paragraph-properties fo:text-align="center" style:justify-single-word="false"/>
      <style:text-properties fo:font-size="18pt" fo:font-weight="bold" officeooo:rsid="000032d8" officeooo:paragraph-rsid="00050e69" style:font-size-asian="18pt" style:font-weight-asian="bold" style:font-size-complex="18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4pt" fo:font-weight="normal" officeooo:rsid="000032d8" officeooo:paragraph-rsid="00050e69" style:font-size-asian="12.25pt" style:font-weight-asian="normal" style:font-size-complex="14pt" style:font-weight-complex="normal"/>
    </style:style>
    <style:style style:name="P9" style:family="paragraph" style:parent-style-name="Standard">
      <style:paragraph-properties fo:margin-left="8.754cm" fo:text-align="justify" style:justify-single-word="false" fo:text-indent="0cm" style:auto-text-indent="false"/>
      <style:text-properties fo:font-size="14pt" fo:font-weight="normal" officeooo:rsid="0005df53" officeooo:paragraph-rsid="0005df53" style:font-size-asian="12.25pt" style:font-weight-asian="normal" style:font-size-complex="14pt" style:font-weight-complex="normal"/>
    </style:style>
    <style:style style:name="P10" style:family="paragraph" style:parent-style-name="Standard">
      <style:paragraph-properties fo:margin-left="8.754cm" fo:text-align="justify" style:justify-single-word="false" fo:text-indent="0cm" style:auto-text-indent="false"/>
      <style:text-properties officeooo:rsid="00050e69" officeooo:paragraph-rsid="0005df53"/>
    </style:style>
    <style:style style:name="P11" style:family="paragraph" style:parent-style-name="Standard">
      <style:paragraph-properties fo:text-align="center" style:justify-single-word="false"/>
      <style:text-properties fo:font-size="14pt" fo:font-weight="normal" officeooo:rsid="00050e69" officeooo:paragraph-rsid="00050e69" style:font-size-asian="12.25pt" style:font-weight-asian="normal" style:font-size-complex="14pt" style:font-weight-complex="normal"/>
    </style:style>
    <style:style style:name="P12" style:family="paragraph" style:parent-style-name="Standard">
      <style:paragraph-properties fo:text-align="center" style:justify-single-word="false"/>
      <style:text-properties fo:font-size="14pt" fo:font-weight="normal" officeooo:rsid="0005df53" officeooo:paragraph-rsid="0005df53" style:font-size-asian="12.25pt" style:font-weight-asian="normal" style:font-size-complex="14pt" style:font-weight-complex="normal"/>
    </style:style>
    <style:style style:name="P13" style:family="paragraph" style:parent-style-name="Contents_20_Heading">
      <style:paragraph-properties fo:break-before="page"/>
    </style:style>
    <style:style style:name="P14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5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16" style:family="paragraph" style:parent-style-name="Heading_20_1">
      <style:paragraph-properties fo:break-before="page"/>
      <style:text-properties officeooo:rsid="0008c01d" officeooo:paragraph-rsid="0008c01d"/>
    </style:style>
    <style:style style:name="P17" style:family="paragraph" style:parent-style-name="Text_20_body">
      <style:text-properties officeooo:paragraph-rsid="0008c01d"/>
    </style:style>
    <style:style style:name="P18" style:family="paragraph" style:parent-style-name="Standard">
      <style:paragraph-properties fo:margin-top="0cm" fo:margin-bottom="0cm" style:contextual-spacing="false" fo:line-height="150%" fo:text-align="justify" style:justify-single-word="false" fo:text-indent="1.251cm" style:auto-text-indent="false"/>
      <style:text-properties fo:color="#000000" loext:opacity="100%" style:font-name="Times New Roman" officeooo:paragraph-rsid="000a7034" style:letter-kerning="false" style:font-name-asian="Calibri" style:font-size-asian="14pt" style:font-name-complex="Times New Roman1" style:font-size-complex="14pt"/>
    </style:style>
    <style:style style:name="P19" style:family="paragraph" style:parent-style-name="Text_20_body">
      <style:paragraph-properties fo:margin-top="0cm" fo:margin-bottom="0.499cm" style:contextual-spacing="false"/>
      <style:text-properties fo:color="#000000" loext:opacity="100%" style:font-name="Times New Roman" officeooo:paragraph-rsid="000b7d01" style:letter-kerning="false" style:font-name-asian="Calibri" style:font-size-asian="14pt" style:font-name-complex="Times New Roman1" style:font-size-complex="14pt"/>
    </style:style>
    <style:style style:name="P20" style:family="paragraph" style:parent-style-name="Text_20_body" style:list-style-name="L1">
      <style:paragraph-properties fo:margin-top="0cm" fo:margin-bottom="0.499cm" style:contextual-spacing="false"/>
      <style:text-properties officeooo:paragraph-rsid="000b7d01"/>
    </style:style>
    <style:style style:name="P21" style:family="paragraph" style:parent-style-name="Text_20_body">
      <style:paragraph-properties fo:margin-top="0cm" fo:margin-bottom="0.499cm" style:contextual-spacing="false"/>
      <style:text-properties fo:color="#000000" loext:opacity="100%" style:font-name="Times New Roman" fo:font-size="14pt" officeooo:paragraph-rsid="000b7d01" style:letter-kerning="false" style:font-name-asian="Calibri" style:font-size-asian="14pt" style:font-name-complex="Times New Roman1" style:font-size-complex="14pt"/>
    </style:style>
    <style:style style:name="P22" style:family="paragraph" style:parent-style-name="Standard">
      <style:paragraph-properties fo:margin-top="0cm" fo:margin-bottom="0cm" style:contextual-spacing="false" fo:line-height="150%" fo:text-align="justify" style:justify-single-word="false" fo:text-indent="1.251cm" style:auto-text-indent="false"/>
      <style:text-properties officeooo:paragraph-rsid="000a7034"/>
    </style:style>
    <style:style style:name="P23" style:family="paragraph" style:parent-style-name="Standard" style:list-style-name="L2">
      <style:paragraph-properties fo:margin-top="0cm" fo:margin-bottom="0cm" style:contextual-spacing="false" fo:line-height="150%" fo:text-align="justify" style:justify-single-word="false"/>
      <style:text-properties officeooo:paragraph-rsid="000a7034"/>
    </style:style>
    <style:style style:name="P24" style:family="paragraph" style:parent-style-name="Standard">
      <style:paragraph-properties fo:margin-top="0cm" fo:margin-bottom="0cm" style:contextual-spacing="false" fo:line-height="150%" fo:text-align="justify" style:justify-single-word="false" fo:text-indent="1.251cm" style:auto-text-indent="false"/>
      <style:text-properties officeooo:rsid="000f3aa0" officeooo:paragraph-rsid="000f3aa0"/>
    </style:style>
    <style:style style:name="P25" style:family="paragraph" style:parent-style-name="Standard" style:list-style-name="L3">
      <style:paragraph-properties fo:margin-top="0cm" fo:margin-bottom="0cm" style:contextual-spacing="false" fo:line-height="150%" fo:text-align="justify" style:justify-single-word="false"/>
      <style:text-properties officeooo:paragraph-rsid="000f3aa0"/>
    </style:style>
    <style:style style:name="P26" style:family="paragraph" style:parent-style-name="Standard" style:list-style-name="L3">
      <style:paragraph-properties fo:margin-top="0cm" fo:margin-bottom="0cm" style:contextual-spacing="false" fo:line-height="150%" fo:text-align="justify" style:justify-single-word="false"/>
      <style:text-properties officeooo:paragraph-rsid="00117750"/>
    </style:style>
    <style:style style:name="P27" style:family="paragraph" style:parent-style-name="Standard" style:list-style-name="L3">
      <style:paragraph-properties fo:margin-top="0cm" fo:margin-bottom="0cm" style:contextual-spacing="false" fo:line-height="150%" fo:text-align="justify" style:justify-single-word="false"/>
      <style:text-properties officeooo:paragraph-rsid="001253e4"/>
    </style:style>
    <style:style style:name="P28" style:family="paragraph" style:parent-style-name="Standard" style:list-style-name="L3">
      <style:paragraph-properties fo:margin-top="0cm" fo:margin-bottom="0cm" style:contextual-spacing="false" fo:line-height="150%" fo:text-align="justify" style:justify-single-word="false"/>
      <style:text-properties officeooo:rsid="001253e4" officeooo:paragraph-rsid="001253e4"/>
    </style:style>
    <style:style style:name="P29" style:family="paragraph" style:parent-style-name="Standard" style:list-style-name="L3">
      <style:paragraph-properties fo:margin-top="0cm" fo:margin-bottom="0cm" style:contextual-spacing="false" fo:line-height="150%" fo:text-align="justify" style:justify-single-word="false"/>
      <style:text-properties officeooo:paragraph-rsid="0014dd63"/>
    </style:style>
    <style:style style:name="P30" style:family="paragraph" style:parent-style-name="Standard">
      <style:paragraph-properties fo:margin-top="0cm" fo:margin-bottom="0cm" style:contextual-spacing="false" fo:line-height="150%" fo:text-align="justify" style:justify-single-word="false" fo:text-indent="1.251cm" style:auto-text-indent="false"/>
      <style:text-properties officeooo:paragraph-rsid="00161d50"/>
    </style:style>
    <style:style style:name="P31" style:family="paragraph" style:parent-style-name="Standard">
      <style:paragraph-properties fo:margin-top="0cm" fo:margin-bottom="0cm" style:contextual-spacing="false" fo:line-height="150%" fo:text-align="justify" style:justify-single-word="false" fo:text-indent="1.251cm" style:auto-text-indent="false"/>
      <style:text-properties officeooo:paragraph-rsid="0017c8ae"/>
    </style:style>
    <style:style style:name="P32" style:family="paragraph" style:parent-style-name="Standard">
      <style:paragraph-properties fo:margin-top="0cm" fo:margin-bottom="0cm" style:contextual-spacing="false" fo:line-height="150%" fo:text-align="justify" style:justify-single-word="false" fo:text-indent="1.251cm" style:auto-text-indent="false"/>
      <style:text-properties officeooo:paragraph-rsid="0019496e"/>
    </style:style>
    <style:style style:name="P33" style:family="paragraph" style:parent-style-name="Standard">
      <style:paragraph-properties fo:margin-top="0cm" fo:margin-bottom="0cm" style:contextual-spacing="false" fo:line-height="150%" fo:text-align="justify" style:justify-single-word="false" fo:text-indent="1.251cm" style:auto-text-indent="false"/>
      <style:text-properties officeooo:paragraph-rsid="001ad318"/>
    </style:style>
    <style:style style:name="P34" style:family="paragraph" style:parent-style-name="Heading_20_1">
      <style:paragraph-properties fo:break-before="page"/>
    </style:style>
    <style:style style:name="P35" style:family="paragraph" style:parent-style-name="Text_20_body">
      <style:text-properties officeooo:paragraph-rsid="0027be64"/>
    </style:style>
    <style:style style:name="P36" style:family="paragraph" style:parent-style-name="Text_20_body">
      <style:text-properties officeooo:paragraph-rsid="001d8e22"/>
    </style:style>
    <style:style style:name="P37" style:family="paragraph" style:parent-style-name="Text_20_body">
      <style:text-properties officeooo:paragraph-rsid="001efc56"/>
    </style:style>
    <style:style style:name="P38" style:family="paragraph" style:parent-style-name="Text_20_body">
      <style:paragraph-properties fo:text-align="center" style:justify-single-word="false"/>
      <style:text-properties officeooo:paragraph-rsid="001efc56"/>
    </style:style>
    <style:style style:name="P39" style:family="paragraph" style:parent-style-name="Text_20_body">
      <style:paragraph-properties fo:text-align="center" style:justify-single-word="false"/>
      <style:text-properties officeooo:rsid="002a0538" officeooo:paragraph-rsid="002a0538"/>
    </style:style>
    <style:style style:name="P40" style:family="paragraph" style:parent-style-name="Text_20_body">
      <style:paragraph-properties fo:text-align="justify" style:justify-single-word="false"/>
      <style:text-properties officeooo:rsid="002a0538" officeooo:paragraph-rsid="002a0538"/>
    </style:style>
    <style:style style:name="P41" style:family="paragraph" style:parent-style-name="Text_20_body" style:list-style-name="L4">
      <style:paragraph-properties fo:text-align="justify" style:justify-single-word="false"/>
      <style:text-properties officeooo:rsid="002a0538" officeooo:paragraph-rsid="002a0538"/>
    </style:style>
    <style:style style:name="P42" style:family="paragraph" style:parent-style-name="Text_20_body">
      <style:text-properties officeooo:rsid="002962fc" officeooo:paragraph-rsid="002962fc"/>
    </style:style>
    <style:style style:name="P43" style:family="paragraph" style:parent-style-name="Text_20_body">
      <style:paragraph-properties fo:text-align="center" style:justify-single-word="false"/>
      <style:text-properties officeooo:rsid="002962fc" officeooo:paragraph-rsid="002962fc"/>
    </style:style>
    <style:style style:name="P44" style:family="paragraph" style:parent-style-name="Text_20_body">
      <style:paragraph-properties fo:text-align="center" style:justify-single-word="false"/>
      <style:text-properties officeooo:rsid="002b9812" officeooo:paragraph-rsid="002b9812"/>
    </style:style>
    <style:style style:name="P45" style:family="paragraph" style:parent-style-name="Text_20_body">
      <style:paragraph-properties fo:text-align="justify" style:justify-single-word="false"/>
      <style:text-properties officeooo:rsid="002d6169" officeooo:paragraph-rsid="002d6169"/>
    </style:style>
    <style:style style:name="P46" style:family="paragraph" style:parent-style-name="Table_20_Contents">
      <style:text-properties officeooo:rsid="002d6169" officeooo:paragraph-rsid="002d6169"/>
    </style:style>
    <style:style style:name="P47" style:family="paragraph" style:parent-style-name="Table_20_Contents">
      <style:text-properties officeooo:paragraph-rsid="002d6169"/>
    </style:style>
    <style:style style:name="P48" style:family="paragraph" style:parent-style-name="Text_20_body">
      <style:text-properties officeooo:rsid="00212554" officeooo:paragraph-rsid="00212554"/>
    </style:style>
    <style:style style:name="P49" style:family="paragraph" style:parent-style-name="Table_20_Contents">
      <style:paragraph-properties fo:text-align="justify" style:justify-single-word="false"/>
      <style:text-properties officeooo:rsid="00212554" officeooo:paragraph-rsid="00212554"/>
    </style:style>
    <style:style style:name="P50" style:family="paragraph" style:parent-style-name="Preformatted_20_Text">
      <style:paragraph-properties fo:text-align="justify" style:justify-single-word="false"/>
      <style:text-properties style:font-name="Times new Roman1" fo:font-size="12pt" fo:language="ru" fo:country="RU" officeooo:rsid="00212554" officeooo:paragraph-rsid="00212554"/>
    </style:style>
    <style:style style:name="P51" style:family="paragraph" style:parent-style-name="Table_20_Contents">
      <style:paragraph-properties fo:text-align="justify" style:justify-single-word="false"/>
      <style:text-properties officeooo:rsid="0021d0b8" officeooo:paragraph-rsid="0021d0b8"/>
    </style:style>
    <style:style style:name="P52" style:family="paragraph" style:parent-style-name="Table_20_Contents">
      <style:paragraph-properties fo:text-align="justify" style:justify-single-word="false"/>
      <style:text-properties officeooo:rsid="00222ed8" officeooo:paragraph-rsid="00222ed8"/>
    </style:style>
    <style:style style:name="P53" style:family="paragraph" style:parent-style-name="Table_20_Contents">
      <style:paragraph-properties fo:text-align="justify" style:justify-single-word="false"/>
      <style:text-properties officeooo:rsid="00222ed8" officeooo:paragraph-rsid="00308b38"/>
    </style:style>
    <style:style style:name="P54" style:family="paragraph" style:parent-style-name="Text_20_body">
      <style:text-properties officeooo:rsid="00308b38" officeooo:paragraph-rsid="00308b38"/>
    </style:style>
    <style:style style:name="P55" style:family="paragraph" style:parent-style-name="Text_20_body">
      <style:paragraph-properties fo:text-align="center" style:justify-single-word="false"/>
      <style:text-properties officeooo:rsid="00308b38" officeooo:paragraph-rsid="00308b38"/>
    </style:style>
    <style:style style:name="P56" style:family="paragraph" style:parent-style-name="Text_20_body">
      <style:paragraph-properties fo:text-align="center" style:justify-single-word="false"/>
      <style:text-properties officeooo:rsid="00325537" officeooo:paragraph-rsid="00325537"/>
    </style:style>
    <style:style style:name="P57" style:family="paragraph" style:parent-style-name="Text_20_body">
      <style:paragraph-properties fo:text-align="justify" style:justify-single-word="false"/>
      <style:text-properties officeooo:rsid="00325537" officeooo:paragraph-rsid="00325537"/>
    </style:style>
    <style:style style:name="P58" style:family="paragraph" style:parent-style-name="Text_20_body">
      <style:paragraph-properties fo:text-align="center" style:justify-single-word="false"/>
      <style:text-properties officeooo:rsid="0033ba02" officeooo:paragraph-rsid="00357d98"/>
    </style:style>
    <style:style style:name="P59" style:family="paragraph" style:parent-style-name="Text_20_body">
      <style:paragraph-properties fo:text-align="justify" style:justify-single-word="false"/>
      <style:text-properties officeooo:rsid="0033ba02" officeooo:paragraph-rsid="00357d98"/>
    </style:style>
    <style:style style:name="P60" style:family="paragraph" style:parent-style-name="Text_20_body" style:list-style-name="L5">
      <style:paragraph-properties fo:text-align="justify" style:justify-single-word="false"/>
      <style:text-properties officeooo:rsid="0033ba02" officeooo:paragraph-rsid="00357d98"/>
    </style:style>
    <style:style style:name="P61" style:family="paragraph" style:parent-style-name="Text_20_body">
      <style:paragraph-properties fo:text-align="justify" style:justify-single-word="false"/>
      <style:text-properties officeooo:paragraph-rsid="0036e743"/>
    </style:style>
    <style:style style:name="P62" style:family="paragraph" style:parent-style-name="Text_20_body">
      <style:paragraph-properties fo:text-align="justify" style:justify-single-word="false"/>
      <style:text-properties officeooo:rsid="0037d480" officeooo:paragraph-rsid="0037d480"/>
    </style:style>
    <style:style style:name="P63" style:family="paragraph" style:parent-style-name="Text_20_body">
      <style:paragraph-properties fo:text-align="center" style:justify-single-word="false"/>
      <style:text-properties officeooo:rsid="0037d480" officeooo:paragraph-rsid="0037d480"/>
    </style:style>
    <style:style style:name="P64" style:family="paragraph" style:parent-style-name="Text_20_body">
      <style:paragraph-properties fo:text-align="center" style:justify-single-word="false"/>
      <style:text-properties officeooo:rsid="0037f709" officeooo:paragraph-rsid="0037f709"/>
    </style:style>
    <style:style style:name="P65" style:family="paragraph" style:parent-style-name="Text_20_body">
      <style:paragraph-properties fo:text-align="justify" style:justify-single-word="false"/>
      <style:text-properties officeooo:rsid="0037f709" officeooo:paragraph-rsid="0037f709"/>
    </style:style>
    <style:style style:name="P66" style:family="paragraph" style:parent-style-name="Table_20_Contents">
      <style:text-properties officeooo:rsid="003a9ab8" officeooo:paragraph-rsid="003a9ab8"/>
    </style:style>
    <style:style style:name="P67" style:family="paragraph" style:parent-style-name="Text_20_body">
      <style:paragraph-properties fo:text-align="justify" style:justify-single-word="false"/>
      <style:text-properties officeooo:rsid="003a9ab8" officeooo:paragraph-rsid="003a9ab8"/>
    </style:style>
    <style:style style:name="P68" style:family="paragraph" style:parent-style-name="Text_20_body">
      <style:paragraph-properties fo:text-align="center" style:justify-single-word="false"/>
      <style:text-properties officeooo:rsid="003a9ab8" officeooo:paragraph-rsid="003a9ab8"/>
    </style:style>
    <style:style style:name="P69" style:family="paragraph" style:parent-style-name="Text_20_body" style:list-style-name="L6">
      <style:paragraph-properties fo:text-align="justify" style:justify-single-word="false"/>
      <style:text-properties officeooo:rsid="003aedf5" officeooo:paragraph-rsid="003aedf5"/>
    </style:style>
    <style:style style:name="P70" style:family="paragraph" style:parent-style-name="Text_20_body">
      <style:paragraph-properties fo:text-align="justify" style:justify-single-word="false"/>
      <style:text-properties officeooo:rsid="003d75b5" officeooo:paragraph-rsid="003d75b5"/>
    </style:style>
    <style:style style:name="P71" style:family="paragraph" style:parent-style-name="Text_20_body">
      <style:paragraph-properties fo:text-align="justify" style:justify-single-word="false"/>
      <style:text-properties officeooo:rsid="003feb1e" officeooo:paragraph-rsid="003feb1e"/>
    </style:style>
    <style:style style:name="P72" style:family="paragraph" style:parent-style-name="Heading_20_1">
      <style:paragraph-properties fo:break-before="page"/>
      <style:text-properties officeooo:rsid="002760a1" officeooo:paragraph-rsid="002760a1"/>
    </style:style>
    <style:style style:name="P73" style:family="paragraph" style:parent-style-name="Text_20_body" style:list-style-name="L7">
      <style:text-properties officeooo:paragraph-rsid="002760a1"/>
    </style:style>
    <style:style style:name="T1" style:family="text">
      <style:text-properties officeooo:rsid="0003783d"/>
    </style:style>
    <style:style style:name="T2" style:family="text">
      <style:text-properties officeooo:rsid="0006ae8c"/>
    </style:style>
    <style:style style:name="T3" style:family="text">
      <style:text-properties officeooo:rsid="00050e69"/>
    </style:style>
    <style:style style:name="T4" style:family="text">
      <style:text-properties officeooo:rsid="0005df53"/>
    </style:style>
    <style:style style:name="T5" style:family="text">
      <style:text-properties officeooo:rsid="000a7034"/>
    </style:style>
    <style:style style:name="T6" style:family="text">
      <style:text-properties fo:color="#000000" loext:opacity="100%" style:font-name="Times New Roman" fo:font-size="14pt" style:letter-kerning="false" style:font-name-asian="Calibri" style:font-size-asian="14pt" style:font-name-complex="Times New Roman1" style:font-size-complex="14pt"/>
    </style:style>
    <style:style style:name="T7" style:family="text">
      <style:text-properties fo:font-size="14pt"/>
    </style:style>
    <style:style style:name="T8" style:family="text">
      <style:text-properties officeooo:rsid="000b7d01"/>
    </style:style>
    <style:style style:name="T9" style:family="text">
      <style:text-properties fo:color="#000000" loext:opacity="100%" style:font-name="Times New Roman" fo:font-size="14pt" officeooo:rsid="000b7d01" style:letter-kerning="false" style:font-name-asian="Calibri" style:font-size-asian="14pt" style:font-name-complex="Times New Roman1" style:font-size-complex="14pt"/>
    </style:style>
    <style:style style:name="T10" style:family="text">
      <style:text-properties officeooo:rsid="000d560a"/>
    </style:style>
    <style:style style:name="T11" style:family="text">
      <style:text-properties officeooo:rsid="000f3aa0"/>
    </style:style>
    <style:style style:name="T12" style:family="text">
      <style:text-properties officeooo:rsid="0011375b"/>
    </style:style>
    <style:style style:name="T13" style:family="text">
      <style:text-properties officeooo:rsid="00117750"/>
    </style:style>
    <style:style style:name="T14" style:family="text">
      <style:text-properties officeooo:rsid="001253e4"/>
    </style:style>
    <style:style style:name="T15" style:family="text">
      <style:text-properties officeooo:rsid="00147839"/>
    </style:style>
    <style:style style:name="T16" style:family="text">
      <style:text-properties officeooo:rsid="0014dd63"/>
    </style:style>
    <style:style style:name="T17" style:family="text">
      <style:text-properties officeooo:rsid="00161d50"/>
    </style:style>
    <style:style style:name="T18" style:family="text">
      <style:text-properties officeooo:rsid="00161d50" fo:background-color="#ff0000" loext:char-shading-value="0"/>
    </style:style>
    <style:style style:name="T19" style:family="text">
      <style:text-properties style:font-name="Times New Roman" fo:font-size="14pt" style:letter-kerning="false" style:font-name-asian="Times New Roman1" style:font-size-asian="14pt" style:language-asian="ru" style:country-asian="RU" style:font-name-complex="Times New Roman1" style:font-size-complex="14pt"/>
    </style:style>
    <style:style style:name="T20" style:family="text">
      <style:text-properties style:font-name="Times New Roman" fo:font-size="14pt" officeooo:rsid="00161d50" style:letter-kerning="false" style:font-name-asian="Times New Roman1" style:font-size-asian="14pt" style:language-asian="ru" style:country-asian="RU" style:font-name-complex="Times New Roman1" style:font-size-complex="14pt"/>
    </style:style>
    <style:style style:name="T21" style:family="text">
      <style:text-properties style:font-name="Times New Roman" fo:font-size="14pt" officeooo:rsid="0017c8ae" style:letter-kerning="false" style:font-name-asian="Times New Roman1" style:font-size-asian="14pt" style:language-asian="ru" style:country-asian="RU" style:font-name-complex="Times New Roman1" style:font-size-complex="14pt"/>
    </style:style>
    <style:style style:name="T22" style:family="text">
      <style:text-properties officeooo:rsid="0017c8ae"/>
    </style:style>
    <style:style style:name="T23" style:family="text">
      <style:text-properties officeooo:rsid="0019496e"/>
    </style:style>
    <style:style style:name="T24" style:family="text">
      <style:text-properties officeooo:rsid="001ad318"/>
    </style:style>
    <style:style style:name="T25" style:family="text">
      <style:text-properties officeooo:rsid="001b8bb6"/>
    </style:style>
    <style:style style:name="T26" style:family="text">
      <style:text-properties officeooo:rsid="001d8e22"/>
    </style:style>
    <style:style style:name="T27" style:family="text">
      <style:text-properties officeooo:rsid="0027be64"/>
    </style:style>
    <style:style style:name="T28" style:family="text">
      <style:text-properties officeooo:rsid="002962fc"/>
    </style:style>
    <style:style style:name="T29" style:family="text">
      <style:text-properties officeooo:rsid="002a0538"/>
    </style:style>
    <style:style style:name="T30" style:family="text">
      <style:text-properties style:text-position="sub 58%"/>
    </style:style>
    <style:style style:name="T31" style:family="text">
      <style:text-properties officeooo:rsid="002b9812"/>
    </style:style>
    <style:style style:name="T32" style:family="text">
      <style:text-properties officeooo:rsid="002ed3a9"/>
    </style:style>
    <style:style style:name="T33" style:family="text">
      <style:text-properties officeooo:rsid="002d6169"/>
    </style:style>
    <style:style style:name="T34" style:family="text">
      <style:text-properties officeooo:rsid="001f5725"/>
    </style:style>
    <style:style style:name="T35" style:family="text">
      <style:text-properties officeooo:rsid="00212554"/>
    </style:style>
    <style:style style:name="T36" style:family="text">
      <style:text-properties officeooo:rsid="00308b38"/>
    </style:style>
    <style:style style:name="T37" style:family="text">
      <style:text-properties officeooo:rsid="0037f709"/>
    </style:style>
    <style:style style:name="T38" style:family="text">
      <style:text-properties officeooo:rsid="0033ba02"/>
    </style:style>
    <style:style style:name="T39" style:family="text">
      <style:text-properties officeooo:rsid="00325537"/>
    </style:style>
    <style:style style:name="T40" style:family="text">
      <style:text-properties officeooo:rsid="00357d98"/>
    </style:style>
    <style:style style:name="T41" style:family="text">
      <style:text-properties officeooo:rsid="0036e743"/>
    </style:style>
    <style:style style:name="T42" style:family="text">
      <style:text-properties officeooo:rsid="0038f14c"/>
    </style:style>
    <style:style style:name="T43" style:family="text">
      <style:text-properties officeooo:rsid="003a9ab8"/>
    </style:style>
    <style:style style:name="T44" style:family="text">
      <style:text-properties officeooo:rsid="003aedf5"/>
    </style:style>
    <style:style style:name="T45" style:family="text">
      <style:text-properties officeooo:rsid="003caa9c"/>
    </style:style>
    <style:style style:name="T46" style:family="text">
      <style:text-properties officeooo:rsid="003d75b5"/>
    </style:style>
    <style:style style:name="T47" style:family="text">
      <style:text-properties officeooo:rsid="003e201c"/>
    </style:style>
    <style:style style:name="T48" style:family="text">
      <style:text-properties officeooo:rsid="00389c44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ИНИСТЕРСТВО НАУКИ И ВЫСШЕГО ОБРАЗОВАНИЯ РОССИЙСКОЙ ФЕДЕРАЦИИ</text:p>
      <text:p text:style-name="P2">СибГУТИ «СИБИРСКИЙ ГОСУДАРСТВЕННЫЙ УНИВЕРСИТЕТ ТЕЛЕКОММУНИКАЦИЙ И ИНФОРМАТИКИ»</text:p>
      <text:p text:style-name="P3"/>
      <text:p text:style-name="P3">Институт: <text:span text:style-name="T1">Информатики и вычислительной техники</text:span></text:p>
      <text:p text:style-name="P3">Кафедра: <text:span text:style-name="T2">Вычислительных систем</text:span></text:p>
      <text:p text:style-name="P3"/>
      <text:p text:style-name="P3"/>
      <text:p text:style-name="P4">ДОПУСТИТЬ К ЗАЩИТЕ</text:p>
      <text:p text:style-name="P4">Заведующий кафедрой</text:p>
      <text:p text:style-name="P5">__________________ Е.Н. Перышкова</text:p>
      <text:p text:style-name="P5">__________________ 2026 г.</text:p>
      <text:p text:style-name="P6"/>
      <text:p text:style-name="P3"/>
      <text:p text:style-name="P3"/>
      <text:p text:style-name="P3">ВЫПУСКНАЯ КВАЛИФИКАЦИОННАЯ РАБОТА НА ТЕМУ:</text:p>
      <text:p text:style-name="P7">«Разработка <text:span text:style-name="T3">VoIP сервера на Erlang</text:span>»</text:p>
      <text:p text:style-name="P8"/>
      <text:p text:style-name="P8"/>
      <text:p text:style-name="P8"/>
      <text:p text:style-name="P9">Руководитель</text:p>
      <text:p text:style-name="P9">профессор кафедры ВС</text:p>
      <text:p text:style-name="P10">__________________ <text:span text:style-name="T4">М.Г. Курносов</text:span></text:p>
      <text:p text:style-name="P10">__________________ <text:span text:style-name="T4">2026 г.</text:span></text:p>
      <text:p text:style-name="P9">Автор работы</text:p>
      <text:p text:style-name="P9">студент группы ИВ-221</text:p>
      <text:p text:style-name="P10">__________________ <text:span text:style-name="T4">Е.И. Беляев</text:span></text:p>
      <text:p text:style-name="P10">__________________ <text:span text:style-name="T4">2026 г.</text:span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2">Новосибирск 2026</text:p>
      <text:table-of-content text:style-name="Sect1" text:protected="true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 text:protected="true">
            <text:p text:style-name="P13">СОДЕРЖАНИЕ</text:p>
          </text:index-title>
          <text:p text:style-name="P14"><text:a xlink:type="simple" xlink:href="#__RefHeading___Toc7047_1256723539" text:style-name="Index_20_Link" text:visited-style-name="Index_20_Link">ВВЕДЕНИЕ<text:tab/>3</text:a></text:p>
          <text:p text:style-name="P14"><text:a xlink:type="simple" xlink:href="#__RefHeading___Toc7536_1402547187" text:style-name="Index_20_Link" text:visited-style-name="Index_20_Link">1 Теоретические основы и обзор технологий<text:tab/>11</text:a></text:p>
          <text:p text:style-name="P15"><text:a xlink:type="simple" xlink:href="#__RefHeading___Toc7538_1402547187" text:style-name="Index_20_Link" text:visited-style-name="Index_20_Link">1.1 Основы VoIP и протокол SIP<text:tab/>11</text:a></text:p>
        </text:index-body>
      </text:table-of-content>
      <text:p text:style-name="P12"/>
      <text:h text:style-name="P16" text:outline-level="1"><text:bookmark-start text:name="__RefHeading___Toc7047_1256723539"/>ВВЕДЕНИЕ<text:bookmark-end text:name="__RefHeading___Toc7047_1256723539"/></text:h>
      <text:p text:style-name="P17">Голосовая и видеосвязь посредством компьютерных сетей стала популярной во всём мире с конца XX века (последней декады) и в настоящее время широко используется как частными пользователями, так и в корпоративном секторе, а также государственными органами. Применение систем IP-телефонии позволяет компаниям — операторам связи значительно снизить стоимость звонков (особенно международных) и интегрировать телефонию с сервисами Интернета, предоставлять интеллектуальные услуги.</text:p>
      <text:p text:style-name="P17">Под IP-телефонией подразумевается голосовая связь, которая осуществляется по сетям передачи данных, в частности по IP-сетям (IP — Internet Protocol). На сегодняшний день IP-телефония все больше вытесняет традиционные телефонные сети за счет легкости развертывания, низкой стоимости звонка, простоты конфигурирования, высокого качества связи и сравнительной безопасности соединения.</text:p>
      <text:p text:style-name="P17">В традиционной телефонии установка соединения происходит при помощи телефонной станции и преследует исключительно цель разговора. Здесь голосовые сигналы передаются по телефонным линиям, через выделенное подключение. В случае же IP-телефонии, сжатые пакеты данных поступают в глобальную или локальную сеть с определенным адресом и передаются на основе данного адреса. При этом используется уже IP-адресация, со всеми присущими ей особенностями (такими как маршрутизация).</text:p>
      <text:p text:style-name="P17">IP-телефония использует более общую технологию VoIP (англ. Voice over IP) для организации двустороннего общения. Технология VoIP в общем случае подразумевает все варианты передачи голоса через IP, в том числе не имеющие никакого отношения к телефонии и общению людей. Например, технология VoIP применяется для передачи звука в системах IP-видеонаблюдения, в системах оповещения, при трансляции вебинаров, при просмотре фильмов в режиме онлайн и т. п.</text:p>
      <text:p text:style-name="P17"><text:soft-page-break/><text:span text:style-name="T5">VoIP-серверы</text:span> — программные коммутаторы (софтсвитчи), IP-АТС, виртуальные АТС и серверы ВКС, а также специализированные серверы Интернет-сервисов (таких как Skype) обеспечивают пользователей возможностями голосовой и видео-связи в режиме реального времени посредством компьютерной сети. Кроме передачи потоковых медиа-данных (аудио и видео), сервер IP-телефонии подобно классической АТС реализует возможность регистрации оконечного терминала, маршрутизацию вызова и корректное установление соединения между пользователями, а также нередко и дополнительные виды обслуживания.</text:p>
      <text:p text:style-name="P18" loext:marker-style-name="T6"><text:span text:style-name="T7">Актуальность темы выпускной квалификационной работы обусловлена тем, что </text:span>на смену традиционным телекоммуникационным технологиям, основанным на TDM (Time Division Multiplexing) и выделенных каналах связи, приходят решения на базе VoIP. TDM-системы, такие как классические цифровые АТС (например, Siemens HiPath, Avaya Definity, Panasonic KX-TDA), используют физически выделенные линии (E1 потоки) с ж<text:span text:style-name="T8">ё</text:span>стким разделением временных слотов, что приводит к неэффективному использованию пропускной способности, сложности масштабирования, высоким затратам на оборудование и обслуживание, а также ограниченным возможностям интеграции с современными ИТ-сервисами.</text:p>
      <text:p text:style-name="P19">В отличие от TDM, VoIP-серверы (софтсвитчи, IP-АТС) используют уже существующую IP-инфраструктуру, позволяя объединить голосовые и данные сети, что существенно снижает капитальные и операционные затраты. Кроме того, VoIP-решения обеспечивают:</text:p>
      <text:list text:style-name="L1">
        <text:list-item>
          <text:p text:style-name="P20"><text:span text:style-name="T9">Г</text:span><text:span text:style-name="T6">ибкость масштабирования — добавление новых абонентов не требует прокладки дополнительных физических линий;</text:span></text:p>
        </text:list-item>
        <text:list-item>
          <text:p text:style-name="P20"><text:span text:style-name="T9">Г</text:span><text:span text:style-name="T6">еографическую распределенность — сотрудники могут подключаться к корпоративной АТС из любой точки мира при наличии доступа в Интернет;</text:span></text:p>
        </text:list-item>
        <text:list-item>
          <text:p text:style-name="P20"><text:soft-page-break/><text:span text:style-name="T9">И</text:span><text:span text:style-name="T6">нтеграцию с ИТ-сервисами — унифицированные коммуникации (объединение телефонии, видеосвязи, чата, электронной почты, CRM-систем);</text:span></text:p>
        </text:list-item>
        <text:list-item>
          <text:p text:style-name="P20"><text:span text:style-name="T9">Р</text:span><text:span text:style-name="T6">асширенный функционал — виртуальные номера, запись разговоров, интеллектуальная маршрутизация вызовов, контакт-центры, WebRTC и др.</text:span></text:p>
        </text:list-item>
      </text:list>
      <text:p text:style-name="P21"><text:span text:style-name="T10">Т</text:span>радиционные реализации VoIP-серверов (такие как Asterisk, FreeSWITCH и др.) написаны преимущественно на языках C/C++ и, несмотря на свою функциональную полноту, обладают рядом ограничений: монолитная архитектура, сложность горизонтального масштабирования, накладные расходы при обработке большого количества одновременных соединений, а также ограниченные возможности для горячей замены кода без остановки сервиса.</text:p>
      <text:p text:style-name="P22" loext:marker-style-name="T6">В этой связи актуальным является поиск альтернативных технологических платформ, позволяющих создавать VoIP-серверы с принципиально иными характеристиками надежности и масштабируемости. Язык программирования Erlang и платформа OTP (Open Telecom Platform), изначально разработанные компанией Ericsson для нужд телекоммуникационной отрасли, предоставляют уникальные возможности:</text:p>
      <text:list text:style-name="L2">
        <text:list-item>
          <text:p text:style-name="P23" loext:marker-style-name="T6"><text:span text:style-name="T5">Л</text:span>егковесные процессы, позволяющие одновременно обслуживать сотни тысяч соединений;</text:p>
        </text:list-item>
        <text:list-item>
          <text:p text:style-name="P23" loext:marker-style-name="T6"><text:span text:style-name="T5">М</text:span>одель акторов с передачей сообщений, исключающую проблемы синхронизации;</text:p>
        </text:list-item>
        <text:list-item>
          <text:p text:style-name="P23" loext:marker-style-name="T6"><text:span text:style-name="T5">М</text:span>еханизм супервизоров (supervision trees), обеспечивающий беспрецедентную отказоустойчивость;</text:p>
        </text:list-item>
        <text:list-item>
          <text:p text:style-name="P23" loext:marker-style-name="T6"><text:span text:style-name="T5">В</text:span>озможность горячей замены кода (hot code swapping) без остановки системы.</text:p>
        </text:list-item>
      </text:list>
      <text:p text:style-name="P22" loext:marker-style-name="T6"><text:soft-page-break/>Эти характеристики делают Erlang/OTP идеальной платформой для реализации VoIP-серверов, предъявляющих требования высокой доступности (carrier-grade).</text:p>
      <text:p text:style-name="P22" loext:marker-style-name="T6">Однако использование чистого Erlang для реализации SIP-стека (Session Initiation Protocol) с нуля сопряжено со значительными трудозатратами: требуется корректная обработка транзакционных состояний, таймеров, множества транспортов (UDP, TCP, TLS), а также парсинг сложных текстовых сообщений. В связи с этим актуальным является применение специализированного фреймворка NkSIP, который представляет собой зрелый SIP-стек, полностью реализованный на Erlang. NkSIP предоставляет разработчику высокоуровневые абстракции для создания Registrar, Proxy и B2BUA-компонентов, позволяя сосредоточиться на бизнес-логике VoIP-сервера, а не на низкоуровневых деталях протокола. При этом NkSIP наследует все преимущества Erlang/OTP: масштабируемость, отказоустойчивость и поддержку распределенных систем.</text:p>
      <text:p text:style-name="P24" loext:marker-style-name="T6">Цель работы: Спроектировать и реализовать прототип VoIP-сервера на Erlang с использованием NkSIP и Mnesia, реализующий базовую функциональность SIP Registrar и Proxy. Оставить возможность функционального масштабирования разработанной системы.</text:p>
      <text:p text:style-name="P24" loext:marker-style-name="T6">Задачи работы:</text:p>
      <text:list text:style-name="L3">
        <text:list-item>
          <text:p text:style-name="P25" loext:marker-style-name="T6"><text:span text:style-name="T11">Изучить теоретические основы VoIP и </text:span><text:span text:style-name="T12">принципы передачи голоса по IP сетям. Разобрать архитектуру протокола сигнализации SIP: основные методы (</text:span>REGISTER, INVITE, BYE, ACK, CANCEL<text:span text:style-name="T12">), коды ответов, структура сообщений. </text:span>Проанализировать роль протокола SDP для согласования медиапараметров (кодеки, IP-адреса, порты) и протокола RTP/RTCP для передачи голосового трафика.</text:p>
        </text:list-item>
        <text:list-item>
          <text:p text:style-name="P26" loext:marker-style-name="T6">Рассмотреть возможности <text:span text:style-name="T13">платформы </text:span><text:span text:style-name="T12">Erlang/OTP и фреймворка NkSIP. </text:span><text:span text:style-name="T13">Проанализировать способы поддержки о</text:span>тказоустойчивост<text:span text:style-name="T13">и, </text:span><text:soft-page-break/><text:span text:style-name="T13">отслеживания состояния, обработки SIP сигналов, а также создания распределённых систем и хранения информации в таких системах.</text:span></text:p>
        </text:list-item>
        <text:list-item>
          <text:p text:style-name="P27" loext:marker-style-name="T6"><text:span text:style-name="T14">Проанализировать архитектуру существующих VoIP-серверов (включая Asterisk как эталон) для выявления ключевых требований. Выявить сильные и слабые стороны реализации таких платформ. </text:span>Сравнить традиционные подходы к реализации VoIP-серверов (на C/C++) с подходом на базе Erlang/OTP. Сформулировать обоснование выбора Erlang/OTP и NkSIP для разработки собственного VoIP-сервера.</text:p>
        </text:list-item>
        <text:list-item>
          <text:p text:style-name="P27" loext:marker-style-name="T6"><text:span text:style-name="T14">Выработать функциональные и нефункциональные требования к разрабатываемому VoIP-серверу. </text:span>Сформулировать требования к обработке SIP-сигнализации (регистрация, аутентификация, маршрутизация вызовов), к хранению данных абонентов, к отказоустойчивости и масштабируемости системы.</text:p>
        </text:list-item>
        <text:list-item>
          <text:p text:style-name="P28" loext:marker-style-name="T6">Разработать общую архитектуру VoIP-сервера на базе Erlang/OTP с использованием фреймворка NkSIP. Определить взаимодействие компонентов системы: транспортного слоя, модуля регистрации (Registrar), модуля маршрутизации вызовов (Proxy/Call FSM) и модуля хранения данных.</text:p>
        </text:list-item>
        <text:list-item>
          <text:p text:style-name="P28" loext:marker-style-name="T6">Спроектировать структуру OTP-супервизоров для обеспечения отказоустойчивости системы. Разработать дерево супервизоров, определить стратегии перезапуска для каждого компонента. <text:span text:style-name="T15">Добавить механизм динамического добавления процессов вызовов (FSM).</text:span></text:p>
        </text:list-item>
        <text:list-item>
          <text:p text:style-name="P28" loext:marker-style-name="T6">Спроектировать схему данных для хранения информации об абонентах, регистрациях и активных вызовах в базе данных Mnesia. Определить структуры записей (record), типы хранения таблиц (ram_copies / disc_copies), а также индексы для обеспечения быстрого поиска.</text:p>
        </text:list-item>
        <text:list-item>
          <text:p text:style-name="P29" loext:marker-style-name="T6"><text:span text:style-name="T16">Настроить среду разработки: установка Erlang/OTP, системы сборки reabar3. Разобраться в методике подключения фреймворка NkSIP в </text:span><text:soft-page-break/><text:span text:style-name="T16">качестве зависимости. </text:span>Выполнить базовую настройку NkSIP-сервиса для приема SIP-сообщений по протоколу UDP на стандартном порту 5060.</text:p>
        </text:list-item>
        <text:list-item>
          <text:p text:style-name="P29" loext:marker-style-name="T6">Реализовать модуль регистрации (Registrar) на базе NkSIP <text:span text:style-name="T16">и поведения gen_server</text:span>. Обеспечить обработку REGISTER-запросов, реализовать Digest Authentication с использованием встроенных механизмов NkSIP. Реализовать сохранение регистраций в Mnesia с учетом параметра expires и автоматическое удаление просроченных записей.</text:p>
        </text:list-item>
        <text:list-item>
          <text:p text:style-name="P29" loext:marker-style-name="T6">Реализовать модуль маршрутизации вызовов (Proxy/Call FSM) на базе NkSIP и поведения gen_statem. Обеспечить обработку INVITE-запросов, аутентификацию вызывающего абонента, поиск вызываемого абонента в таблице registrations Mnesia. Реализовать проксирование SIP-сообщений между абонентами и корректное завершение вызовов (BYE, CANCEL). Обеспечить формирование SIP-ответов для негативных сценариев (404 Not Found, 408 Timeout, 486 Busy).</text:p>
        </text:list-item>
        <text:list-item>
          <text:p text:style-name="P29" loext:marker-style-name="T6">Реализовать модуль хранения данных на базе Mnesia. Определить record-структуры для таблиц users, registrations и active_calls. Реализовать создание таблиц при старте приложения с выбором соответствующих типов хранения. Разработать функции-обертки для выполнения операций добавления, обновления, поиска и удаления записей с использованием транзакций Mnesia для обеспечения атомарности.</text:p>
        </text:list-item>
        <text:list-item>
          <text:p text:style-name="P29" loext:marker-style-name="T6">Провести функциональное тестирование разработанного VoIP-сервера с использованием SIP-клиентов (Zoiper, Linphone, <text:span text:style-name="T16">Twinkle</text:span>). Проверить сценарии: регистрацию абонентов, успешное установление и завершение вызова между двумя абонентами, обработку негативных сценариев (неверный пароль, вызов незарегистрированного абонента, занятость абонента). Выполнить анализ SIP-трафика с помощью Wireshark для верификации корректности формируемых сообщений.</text:p>
        </text:list-item>
        <text:list-item>
          <text:p text:style-name="P29" loext:marker-style-name="T6"><text:soft-page-break/>Провести нагрузочное тестирование разработанного VoIP-сервера с использованием инструмента SIPp. Проанализировать поведение системы под нагрузкой (потребление CPU и памяти).</text:p>
        </text:list-item>
        <text:list-item>
          <text:p text:style-name="P29" loext:marker-style-name="T6">Провести тестирование отказоустойчивости разработанного VoIP-сервера. Смоделировать сбои отдельных компонентов и проверить корректность их перезапуска супервизорами. Убедиться, что активные вызовы не сбрасываются при перезапуске некритичных компонентов.</text:p>
        </text:list-item>
        <text:list-item>
          <text:p text:style-name="P29" loext:marker-style-name="T6">Выполнить анализ полученных результатов. Сравнить производительность и надежность разработанного VoIP-сервера с традиционными решениями (Asterisk, FreeSWITCH). Сформулировать выводы о преимуществах и недостатках подхода на базе Erlang/OTP и NkSIP. Определить направления дальнейшего развития и возможные области применения разработанного решения.</text:p>
        </text:list-item>
      </text:list>
      <text:p text:style-name="P30" loext:marker-style-name="T6"><text:span text:style-name="T17">Объект исследования: </text:span>Системы IP-телефонии.</text:p>
      <text:p text:style-name="P30" loext:marker-style-name="T6">Предмет исследования: Методы реализации VoIP сервера с использованием Erlang/OTP, NkSIP и Mnesia.</text:p>
      <text:p text:style-name="P30" loext:marker-style-name="T6">Практическая значимость: Демонстрация возможности создания легковесного, отказоустойчивого VoIP сервера на Erlang, который может быть альтернативой "тяжелым" решениям вроде Asterisk для специфических сценариев.</text:p>
      <text:p text:style-name="P30" loext:marker-style-name="T6">Структура выпускной квалификационной работы состоит из введения, трех глав, заключения, списка использованных источников в количестве <text:span text:style-name="T18">_</text:span> наименований, <text:span text:style-name="T18">_</text:span> приложения. В работе содержится <text:span text:style-name="T18">_</text:span> рисунка и <text:span text:style-name="T18">_</text:span> таблиц.</text:p>
      <text:p text:style-name="P30" loext:marker-style-name="T19"><text:span text:style-name="T19">Во введении раскрываются </text:span><text:span text:style-name="T20">стек технологий</text:span><text:span text:style-name="T19">, актуальность темы, формулируются цель, задачи, объект, предмет исследования, а также определяется практическая значимость работы.</text:span></text:p>
      <text:p text:style-name="P30" loext:marker-style-name="T19"><text:span text:style-name="T19">В первой главе рассматриваются теоретические аспекты IP-телефонии, включая принципы передачи голоса по IP-сетям, архитектуру протокола SIP, его основные методы и коды ответов, а также роль протоколов SDP и </text:span><text:soft-page-break/><text:span text:style-name="T19">RTP/RTCP. Проводится анализ платформы Erlang/OTP, </text:span><text:span text:style-name="T21">фреймворка NkSIP и существующих VoIP-серверов. </text:span>На основе проведенного анализа формулируется обоснование выбора Erlang/OTP и NkSIP для разработки собственного VoIP-сервера.</text:p>
      <text:p text:style-name="P31" loext:marker-style-name="T19"><text:span text:style-name="T22">Во второй главе </text:span>определяются функциональные и нефункциональные требования к разрабатываемому VoIP-серверу, <text:span text:style-name="T22">р</text:span>азрабатывается общая архитектура системы, <text:span text:style-name="T22">п</text:span>роектируется структура <text:span text:style-name="T22">дерева </text:span>OTP-супервизоров, <text:span text:style-name="T22">с</text:span>оздается схема конечного автомата вызова (Call FSM), <text:span text:style-name="T22">п</text:span>роектируется схема данных для хранения информации <text:span text:style-name="T22">в Mnesia.</text:span></text:p>
      <text:p text:style-name="P32" loext:marker-style-name="T19"><text:span text:style-name="T22">В третьей главе </text:span>описывается процесс реализации VoIP-сервера. Настраивается среда разработки, <text:span text:style-name="T23">р</text:span>еализуется модуль регистрации (Registrar) на базе NkSIP <text:span text:style-name="T23">и</text:span> поведения gen_s<text:span text:style-name="T23">erver</text:span>, <text:span text:style-name="T23">р</text:span>еализуется модуль маршрутизации вызовов (Proxy/Call FSM) на базе NkSIP и поведения gen_statem, <text:span text:style-name="T23">р</text:span>еализуется модуль хранения данных на базе Mnesia.</text:p>
      <text:p text:style-name="P33" loext:marker-style-name="T19">В четвертой главе описывается процесс тестирования разработанного VoIP-сервера. Проводится функциональное тестирование с использованием SIP-клиентов, <text:s/><text:span text:style-name="T24">в</text:span>ыполн<text:span text:style-name="T24">яется</text:span> анализ SIP-трафика, <text:span text:style-name="T24">п</text:span>роводится нагрузочное тестирование с использованием инструмента SIPp, <text:span text:style-name="T24">п</text:span>роводится тестирование отказоустойчивости, выполняется анализ полученных результатов.</text:p>
      <text:p text:style-name="P33" loext:marker-style-name="T19">В заключении подводятся итоги выполненной работы, формулируются основные результаты, достигнутые в ходе исследования и разработки VoIP-сервера на Erlang/OTP с использованием фреймворка NkSIP и базы данных Mnesia.</text:p>
      <text:h text:style-name="P34" text:outline-level="1"><text:bookmark-start text:name="__RefHeading___Toc7536_1402547187"/><text:span text:style-name="T25">1 </text:span>Теоретические основы и обзор технологий<text:bookmark-end text:name="__RefHeading___Toc7536_1402547187"/></text:h>
      <text:h text:style-name="Heading_20_2" text:outline-level="2"><text:bookmark-start text:name="__RefHeading___Toc7538_1402547187"/><text:span text:style-name="T25">1.1 </text:span>Основы VoIP и протокол SIP<text:bookmark-end text:name="__RefHeading___Toc7538_1402547187"/></text:h>
      <text:p text:style-name="P35"><text:span text:style-name="T26">VoIP (Voice over IP) — технология передачи голоса или мультимедиа по сетям передачи данных, </text:span>в частности по IP-сетям (IP — Internet Protocol), преобразующая аналоговый звуковой сигнал в цифровые пакеты данных. <text:span text:style-name="T27">[3]</text:span> На сегодняшний день IP-телефония все больше вытесняет традиционные телефонные сети за счет легкости развертывания, низкой стоимости звонка, простоты конфигурирования, высокого качества связи и сравнительной безопасности соединения.</text:p>
      <text:p text:style-name="P36">Технология VoIP позволяет традиционным телефонным услугам работать в компьютерных сетях, используя пакетные протоколы. <text:span text:style-name="T28">[5] </text:span>Вместе с голосовыми сигналами пакет VoIP включает в себя сетевые адреса как вызывающего абонента, так и получателя. Пакеты VoIP могут передаваться по любой сети, совместимой с VoIP. Пакетная VoIP-связь передает голосовые сигналы в пакеты, подобно электронному конверту. Поскольку VoIP использует пакеты, по сети можно передавать гораздо больше информации для поддержки и улучшения ваших коммуникационных потребностей по сравнению с традиционными методами телефонии.</text:p>
      <text:p text:style-name="P37">В сети с коммутацией каналов, такой как POTS (технология традиционной аналоговой телефонии), маршрутизация менее динамична, чем в сети с пакетной коммутацией. В сети POTS, если линия не работает, вызов не может быть осуществлен. В сети с пакетной коммутацией может быть установлено несколько маршрутов, и пакеты могут передаваться по любому из доступных маршрутов. Если одна из линий, поддерживающих сеть, не работает, пакет может переключиться на другой работающий маршрут, чтобы поддерживать связь. <text:span text:style-name="T28">[4] Доступ в интернет становится более универсальным, </text:span><text:span text:style-name="T29">пример архитектуры сети с использованием устройств IP-телефонии представлен на рисунке 1</text:span><text:span text:style-name="T28">:</text:span></text:p>
      <text:p text:style-name="P38"><text:soft-page-break/><draw:frame draw:style-name="fr1" draw:name="Изображение1" text:anchor-type="as-char" svg:width="17cm" svg:height="7.851cm" draw:z-index="0"><draw:image xlink:href="Pictures/10000000000002F80000015F8C488DF0.jpg" xlink:type="simple" xlink:show="embed" xlink:actuate="onLoad" draw:mime-type="image/jpeg"/></draw:frame></text:p>
      <text:p text:style-name="P39">Рисунок 1 - <text:s/>Компьютерная сеть с наложенной на нее IP-телефонией [4]</text:p>
      <text:p text:style-name="P40">На рисунке показаны:</text:p>
      <text:list text:style-name="L4">
        <text:list-item>
          <text:p text:style-name="P41">А, В - абоненты, обменивающиеся информацией по сети.</text:p>
        </text:list-item>
        <text:list-item>
          <text:p text:style-name="P41">K<text:span text:style-name="T30">А</text:span>, К<text:span text:style-name="T30">В</text:span> - компьютеры абонентов А и В соответственно.</text:p>
        </text:list-item>
        <text:list-item>
          <text:p text:style-name="P41">Ш<text:span text:style-name="T30">А</text:span> и Ш<text:span text:style-name="T30">В</text:span> - шлюзы А и В.</text:p>
        </text:list-item>
        <text:list-item>
          <text:p text:style-name="P41">FAX<text:span text:style-name="T30">А</text:span> и FAX<text:span text:style-name="T30">В</text:span> - телефаксы А и В.</text:p>
        </text:list-item>
        <text:list-item>
          <text:p text:style-name="P41">ТA<text:span text:style-name="T30">А</text:span> и ТA<text:span text:style-name="T30">В</text:span> - телефоны А и В.</text:p>
        </text:list-item>
      </text:list>
      <text:p text:style-name="P42">В аналоговой телефонии передача голоса происходит путём преобразования звуковых волн в непрерывный электрический сигнал, который проходит по медным проводам от микрофона до динамика собеседника. <text:span text:style-name="T29">В IP-телефонии голос </text:span><text:span text:style-name="T31">с помощью микрофона преобразуется в аналоговый электрический сигнал, который проходит ряд преобразований (кодируется и оцифровывается). После оцифровки цифровой сигнал (канал 64 кбит/c) сжимается в соответствии с выбранным типом кодирующего устройства (кодеком). [4] Схематический рисунок разбиения голосового сообщения на пакеты и их передача по сети от абонента A до абонента B представлен на рисунке 2:</text:span></text:p>
      <text:p text:style-name="P43"><text:soft-page-break/><draw:frame draw:style-name="fr2" draw:name="Изображение2" text:anchor-type="as-char" svg:width="16.748cm" svg:height="8.89cm" draw:z-index="1"><draw:image xlink:href="Pictures/100000000000027900000150877A9E29.jpg" xlink:type="simple" xlink:show="embed" xlink:actuate="onLoad" draw:mime-type="image/jpeg"/></draw:frame></text:p>
      <text:p text:style-name="P44">Рисунок 2 — Разбиение на пакеты [4]</text:p>
      <text:p text:style-name="P45">Под разные требования к голосовой связи и ВКС существует набор основных видов кодирующих устройств. Они отличаются скоростью передачи данных, типом лицензии, стандартом, качеством звука, производительностью и тд. Основные виды кодеков с краткой сравнительной характеристикой представлены в таблице 1.1:</text:p>
      <text:p text:style-name="P45"/>
      <text:p text:style-name="P45">Таблица 1.1 — Виды современных кодеков <text:span text:style-name="T32">[6]</text:span>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>
          <table:table-cell table:style-name="Таблица2.A1" office:value-type="string">
            <text:p text:style-name="P46">Кодек</text:p>
          </table:table-cell>
          <table:table-cell table:style-name="Таблица2.A1" office:value-type="string">
            <text:p text:style-name="Table_20_Contents">Скорость передачи, Кб/сек.</text:p>
          </table:table-cell>
          <table:table-cell table:style-name="Таблица2.C1" office:value-type="string">
            <text:p text:style-name="P46">Лицензирование</text:p>
          </table:table-cell>
        </table:table-row>
        <table:table-row>
          <table:table-cell table:style-name="Таблица2.A2" office:value-type="string">
            <text:p text:style-name="Table_20_Contents">G.711</text:p>
          </table:table-cell>
          <table:table-cell table:style-name="Таблица2.A2" office:value-type="string">
            <text:p text:style-name="Table_20_Contents">64 Кб/сек.</text:p>
          </table:table-cell>
          <table:table-cell table:style-name="Таблица2.C2" office:value-type="string">
            <text:p text:style-name="P46">Нет</text:p>
          </table:table-cell>
        </table:table-row>
        <table:table-row>
          <table:table-cell table:style-name="Таблица2.A2" office:value-type="string">
            <text:p text:style-name="Table_20_Contents">G.726</text:p>
          </table:table-cell>
          <table:table-cell table:style-name="Таблица2.A2" office:value-type="string">
            <text:p text:style-name="Table_20_Contents">16, 24, 32 или 40 Кб/ сек.</text:p>
          </table:table-cell>
          <table:table-cell table:style-name="Таблица2.C2" office:value-type="string">
            <text:p text:style-name="P46">Нет</text:p>
          </table:table-cell>
        </table:table-row>
        <table:table-row table:style-name="Таблица2.4">
          <table:table-cell table:style-name="Таблица2.A2" office:value-type="string">
            <text:p text:style-name="Table_20_Contents">G.729А</text:p>
          </table:table-cell>
          <table:table-cell table:style-name="Таблица2.A2" office:value-type="string">
            <text:p text:style-name="P46">8 Кб/сек.</text:p>
          </table:table-cell>
          <table:table-cell table:style-name="Таблица2.C2" office:value-type="string">
            <text:p text:style-name="P46">Да</text:p>
          </table:table-cell>
        </table:table-row>
        <table:table-row>
          <table:table-cell table:style-name="Таблица2.A2" office:value-type="string">
            <text:p text:style-name="Table_20_Contents">GSM</text:p>
          </table:table-cell>
          <table:table-cell table:style-name="Таблица2.A2" office:value-type="string">
            <text:p text:style-name="P47"><text:span text:style-name="T33">13</text:span> Кб/сек.</text:p>
          </table:table-cell>
          <table:table-cell table:style-name="Таблица2.C2" office:value-type="string">
            <text:p text:style-name="P46">Нет</text:p>
          </table:table-cell>
        </table:table-row>
        <table:table-row>
          <table:table-cell table:style-name="Таблица2.A2" office:value-type="string">
            <text:p text:style-name="Table_20_Contents">iLBC</text:p>
          </table:table-cell>
          <table:table-cell table:style-name="Таблица2.A2" office:value-type="string">
            <text:p text:style-name="Table_20_Contents">13.3 Кб/ сек. (30 мс фрейма);</text:p>
            <text:p text:style-name="Table_20_Contents">15.2 Кб/ сек. (20 мс фрейма)</text:p>
          </table:table-cell>
          <table:table-cell table:style-name="Таблица2.C2" office:value-type="string">
            <text:p text:style-name="P46">Нет</text:p>
          </table:table-cell>
        </table:table-row>
        <table:table-row>
          <table:table-cell table:style-name="Таблица2.A2" office:value-type="string">
            <text:p text:style-name="Table_20_Contents">Speex</text:p>
          </table:table-cell>
          <table:table-cell table:style-name="Таблица2.A2" office:value-type="string">
            <text:p text:style-name="Table_20_Contents">Диапазон от 2.15 до 22.4 Кб/ сек.</text:p>
          </table:table-cell>
          <table:table-cell table:style-name="Таблица2.C2" office:value-type="string">
            <text:p text:style-name="P46">Нет</text:p>
          </table:table-cell>
        </table:table-row>
        <table:table-row>
          <table:table-cell table:style-name="Таблица2.A2" office:value-type="string">
            <text:p text:style-name="Table_20_Contents">G.722</text:p>
          </table:table-cell>
          <table:table-cell table:style-name="Таблица2.A2" office:value-type="string">
            <text:p text:style-name="Table_20_Contents">64 Кб/сек.</text:p>
          </table:table-cell>
          <table:table-cell table:style-name="Таблица2.C2" office:value-type="string">
            <text:p text:style-name="P46">Нет</text:p>
          </table:table-cell>
        </table:table-row>
      </table:table>
      <text:p text:style-name="P45"/>
      <text:p text:style-name="P37">В VoIP голосовые сигналы могут передаваться по той же инфраструктуре пакетной сети, которую компании уже используют для передачи своих компьютерных данных. IP-телефония работает, принимая традиционные <text:soft-page-break/>голосовые сигналы и преобразуя их в форму, которая может легко передаваться по локальной сети.</text:p>
      <text:p text:style-name="P37">Все IP-телефоны имеют встроенную сетевую карту (NIC), аналогичную той, что используется в компьютерах. NIC имеет решающее значение для любого сетевого устройства, поскольку она предоставляет устройству физический адрес и способ связи по сети.</text:p>
      <text:p text:style-name="P37">Физический адрес, предоставляемый NIC, называется MAC-адресом. MAC расшифровывается как media access control (управление доступом к среде передачи). <text:span text:style-name="T32">[8]</text:span> MAC-адрес использует стандартизированный адрес и обычно представляется шестью шестнадцатеричными числами, разделенными дефисами. Например, следующий MAC-адрес является допустимым: 00-0A-E4-02-7B-99.</text:p>
      <text:p text:style-name="P37">Для поддержки IP-телефонии обычно выделяется сервер, на котором запускается программное обеспечение, используемое для управления вызовами. Серверы похожи на персональные компьютеры, за исключением того, что они обладают большей памятью, скоростью и производительностью. Сервер хранит базу данных, которая содержит все MAC-адреса, соответствующие всем добавочным номерам IP-телефонов, назначенным пользователям.</text:p>
      <text:p text:style-name="P37">В зависимости от размера локальной сети устанавливается одно или несколько устройств, известных как коммутаторы. Коммутаторы представляют собой устройства с рядом портов, к которым в конечном итоге подключаются все устройства, имеющие IP-адрес в локальной сети. Обычно коммутаторы устанавливаются в коммутационных шкафах по всей локальной сети и работают круглосуточно. Все коммутаторы соединены между собой, часто с помощью оптоволоконного кабеля.</text:p>
      <text:p text:style-name="P37">Для того, чтобы понять как происходит передача голоса по <text:span text:style-name="T34">IP важно изучить модель TCP/IP. TCP/IP — это группа сетевых протоколов, определяющих правила обмена данными между компьютерами в интернете и локальных сетях. </text:span><text:span text:style-name="T32">[7]</text:span><text:span text:style-name="T34"> TCP/IP адаптирован для поддержки VoIP и доказал свою </text:span><text:soft-page-break/><text:span text:style-name="T34">эффективность в пакетной передаче телефонных данных так же, как и на протяжении многих лет в пакетной передаче компьютерных данных. </text:span><text:span text:style-name="T35">Каждый протокол соответствует одному из </text:span><text:span text:style-name="T32">четырёх</text:span><text:span text:style-name="T35"> возможных уровней, составляющих модель TCP/IP:</text:span></text:p>
      <text:p text:style-name="P37"/>
      <text:p text:style-name="P48">Таблица 1.<text:span text:style-name="T33">2</text:span> — <text:span text:style-name="T32">Четыр</text:span><text:span text:style-name="T36">ёхуровневая </text:span>модель TCP/IP <text:span text:style-name="T36">[7]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49">Уровень</text:p>
          </table:table-cell>
          <table:table-cell table:style-name="Таблица1.B1" office:value-type="string">
            <text:p text:style-name="P49">Описание</text:p>
          </table:table-cell>
          <table:table-cell table:style-name="Таблица1.C1" office:value-type="string">
            <text:p text:style-name="P49">Примеры протоколов</text:p>
          </table:table-cell>
        </table:table-row>
        <table:table-row>
          <table:table-cell table:style-name="Таблица1.A2" office:value-type="string">
            <text:p text:style-name="P49">Прикладной уровень (application layer)</text:p>
          </table:table-cell>
          <table:table-cell table:style-name="Таблица1.B2" office:value-type="string">
            <text:p text:style-name="P50">Взаимодействие приложений с сетью, создание данных. Специальные протоколы на этом уровне обеспечивают качество и доставляемость VoIP-пакетов.</text:p>
            <text:p text:style-name="P49"/>
          </table:table-cell>
          <table:table-cell table:style-name="Таблица1.C2" office:value-type="string">
            <text:p text:style-name="P51">DHCP, DNS, FTP, HTTP, HTTPS, SMTP, POP, <text:span text:style-name="T36">SSH</text:span></text:p>
          </table:table-cell>
        </table:table-row>
        <table:table-row>
          <table:table-cell table:style-name="Таблица1.A3" office:value-type="string">
            <text:p text:style-name="P51">Транспортный уровень (transport layer)</text:p>
          </table:table-cell>
          <table:table-cell table:style-name="Таблица1.B3" office:value-type="string">
            <text:p text:style-name="P50">Обеспечивает сквозную доставку данных между узлами, сегментацию, надёжность. На этом уровне протокол пользовательских дейтаграмм (UDP) передает пакеты VoIP от начала до конца, что в данном случае означает от</text:p>
            <text:p text:style-name="P50">вызывающего абонента к получателю и наоборот.</text:p>
          </table:table-cell>
          <table:table-cell table:style-name="Таблица1.C3" office:value-type="string">
            <text:p text:style-name="P51">TCP, UDP, RSVP</text:p>
          </table:table-cell>
        </table:table-row>
        <table:table-row>
          <table:table-cell table:style-name="Таблица1.A4" office:value-type="string">
            <text:p text:style-name="P51">Межсетевой уровень (internet layer)</text:p>
          </table:table-cell>
          <table:table-cell table:style-name="Таблица1.B4" office:value-type="string">
            <text:p text:style-name="P50">Маршрутизация пакетов через сети, логическая адресация. На этом уровне к пакету добавляется IP-адресация. Каждому VoIP-телефону или компьютеру, работающему в качестве VoIP-телефона, присваивается уникальный IP-адрес, который направляет доставку VoIP-пакетов от вызывающего абонента к получателю и обратно в течение всего времени разговора.</text:p>
          </table:table-cell>
          <table:table-cell table:style-name="Таблица1.C4" office:value-type="string">
            <text:p text:style-name="P52">IPv4, IPv6, ICMP, ICMPv6, IGMP, MLD</text:p>
          </table:table-cell>
        </table:table-row>
        <table:table-row>
          <table:table-cell table:style-name="Таблица1.A5" office:value-type="string">
            <text:p text:style-name="P52">Канальный уровень (link layer)</text:p>
          </table:table-cell>
          <table:table-cell table:style-name="Таблица1.B5" office:value-type="string">
            <text:p text:style-name="P50">Отвечает за передачу фреймов между соседними узлами, физическую адресацию (MAC), устан<text:span text:style-name="T36">о</text:span>в<text:span text:style-name="T36">ку</text:span> физическо<text:span text:style-name="T36">го</text:span> соединение между устройствами в локальной сети с помощью радиоволн и проводов.. На этом уровне к пакету добавляется MAC-адрес.</text:p>
          </table:table-cell>
          <table:table-cell table:style-name="Таблица1.C5" office:value-type="string">
            <text:p text:style-name="P53">Ethernet, Wi-Fi, Bluetooth, PPP, MAC, ARP</text:p>
          </table:table-cell>
        </table:table-row>
      </table:table>
      <text:p text:style-name="P48"/>
      <text:p text:style-name="P54">Протоколы TCP/IP применяются немного по-разному в зависимости от того, используется ли традиционный пакет данных или пакет VoIP. На рисунке 3 <text:soft-page-break/>показана показана структура пакетов и соответствующие уровни, задействованные в сетевом соединении TCP/IP для стандартного веб-приложения, которое использует традиционный пакет данных:</text:p>
      <text:p text:style-name="P55"><draw:frame draw:style-name="fr2" draw:name="Изображение3" text:anchor-type="as-char" svg:width="15.002cm" svg:height="12.885cm" draw:z-index="2"><draw:image xlink:href="Pictures/1000000100000237000001E70BEA50CA.png" xlink:type="simple" xlink:show="embed" xlink:actuate="onLoad" draw:mime-type="image/png"/></draw:frame></text:p>
      <text:p text:style-name="P56">Рисунок 3 — <text:span text:style-name="T37">П</text:span>ередача пакета данных стандартного веб-приложения по уровням протокола TCP/IP [1, c. 18]</text:p>
      <text:p text:style-name="P57">Веб-приложение использует на прикладном уровне протокол <text:span text:style-name="T38">HTTP (HyperText Transfer Protocol) </text:span>передачи <text:span text:style-name="T38">данных в клиент-серверной модели, открытый на порту 80. [9] Для веб-приложения важна целостность полученных данных, поэтому на транспортном уровне используется протокол TCP. Основные различия между между передачей пакета данных веб-приложения и VoIP пакета состоят в протоколах на этих двух уровнях (прикладном уровне и транспортном уровне). Это можно увидеть, если посмотреть на структуру </text:span><text:soft-page-break/><text:span text:style-name="T38">пакетов и уровни модели TCP/IP, примененную к вызову VoIP, изображенную на рисунке 4:</text:span></text:p>
      <text:p text:style-name="P56"><draw:frame draw:style-name="fr2" draw:name="Изображение4" text:anchor-type="as-char" svg:width="15.002cm" svg:height="12.885cm" draw:z-index="3"><draw:image xlink:href="Pictures/1000000100000237000001E7E6C61E61.png" xlink:type="simple" xlink:show="embed" xlink:actuate="onLoad" draw:mime-type="image/png"/></draw:frame></text:p>
      <text:p text:style-name="P58">Рисунок 4 - <text:span text:style-name="T37">П</text:span><text:span text:style-name="T39">ередача пакета </text:span><text:span text:style-name="T40">VoIP</text:span><text:span text:style-name="T39"> по уровням протокола TCP/IP [1, c. 1</text:span><text:span text:style-name="T40">9</text:span><text:span text:style-name="T39">]</text:span></text:p>
      <text:p text:style-name="P59">Первое различие между реализацией протокола TCP/IP в VoIP и традиционной реализацией передачи данных заключается в прикладном уровне. При вызове VoIP на прикладном уровне используются следующие три протокола:</text:p>
      <text:list text:style-name="L5">
        <text:list-item>
          <text:p text:style-name="P60">NTP: Протокол сетевого времени. Этот протокол обеспечивает синхронизацию, которая помогает гарантировать, что сигналы передаются и принимаются в течение надлежащего периода времени для обеспечения качества.</text:p>
        </text:list-item>
        <text:list-item>
          <text:p text:style-name="P60"><text:soft-page-break/>RTP: транспортный протокол реального времени. Этот протокол обеспечивает сквозные сетевые транспортные функции для цифровых голосовых сигналов, инкапсулированных в пакеты VoIP. <text:span text:style-name="T40">[5]</text:span></text:p>
        </text:list-item>
        <text:list-item>
          <text:p text:style-name="P60">RTCP: протокол управления транспортом в режиме реального времени. Этот протокол отслеживает передачу речевого сигнала и предоставляет минимальные функции управления для обеспечения доставки пакетов.</text:p>
        </text:list-item>
      </text:list>
      <text:p text:style-name="P57">Второе различие между традиционной реализацией передачи данных по протоколу TCP/IP и реализацией VoIP заключается в транспортном уровне. <text:span text:style-name="T40">Большинство сетей использует TCP на транспортном уровне, тогда как VoIP преимущественно работает на протоколе UDP (</text:span><text:span text:style-name="T41">U</text:span><text:span text:style-name="T40">ser </text:span><text:span text:style-name="T41">D</text:span><text:span text:style-name="T40">atagramm </text:span><text:span text:style-name="T41">P</text:span><text:span text:style-name="T40">rotocol). </text:span><text:span text:style-name="T41">[10, c. 170 — 185] Это обусловлено тем, что большинство стандартных приложений чувствительны к потерям данных при передаче и требуют гарантированной доставки целостного пакета.</text:span></text:p>
      <text:p text:style-name="P61">Протокол TCP работает медленнее, чем протокол UDP, но он обеспечивает гарантированную доставку пакетов компьютерных данных. <text:s/>Поскольку передача голоса осуществляется в режиме реального времени, гораздо важнее, чтобы голосовые пакеты поступали к получателю как можно быстрее. Именно поэтому UDP на сегодняшний день является наиболее предпочтительным средством обеспечения транспортного уровня для сетей VoIP.</text:p>
      <text:p text:style-name="P62">Протокол инициации сеанса, также известный как SIP <text:span text:style-name="T37">(Session Initiation Protocol)</text:span>, это основной протокол мультимедийной связи, используемый в настоящее время. Способ соединения нескольких абонентов в основном применяется для VoIP, но также встречается в онлайн-видеоиграх и службах обмена мгновенными сообщениями.</text:p>
      <text:p text:style-name="P62">SIP — протокол сигнализации, <text:span text:style-name="T37">расположенный на прикладном уровне модели TCP/IP, </text:span>предназначенный для организации, изменения и завершения сеансов связи, в 2002 году принят в качестве протокола сигнализации в <text:soft-page-break/>мобильной телефонии (RFC 3261). SIP независим от транспортных технологий, однако при установлении соединения предпочтительно используется UDP. [5]</text:p>
      <text:p text:style-name="P62">Можно сказать, что прародителем протокола SIP является протокол передачи гипертекста — HTTP. <text:s/>Протокол SIP унаследовал от него синтаксис и клиент-серверную архитектуру, которую иллюстрирует рисунок 5:</text:p>
      <text:p text:style-name="P63"><draw:frame draw:style-name="fr2" draw:name="Изображение5" text:anchor-type="as-char" svg:width="14.658cm" svg:height="5.768cm" draw:z-index="4"><draw:image xlink:href="Pictures/100000000000022A000000DAC1BC844E.jpg" xlink:type="simple" xlink:show="embed" xlink:actuate="onLoad" draw:mime-type="image/jpeg"/></draw:frame></text:p>
      <text:p text:style-name="P64">Рисунок 5 — Архитектура «клиент-сервер» [11]</text:p>
      <text:p text:style-name="P65">Протокол SIP разработан таким образом, что два конечных пира могут устанавливать соединение без участия каких-либо дополнительных элементов, однако, из соображений эксплуатации сетей были введены следующие типы агентов, которые взаимодействуют по модели клиент-сервер:</text:p>
      <text:p text:style-name="P65"/>
      <text:p text:style-name="P65">Таблица <text:span text:style-name="T42">1.3 — Типы агентов, определенные в протоколе SIP [12]</text:span></text:p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66">Компонент</text:p>
          </table:table-cell>
          <table:table-cell table:style-name="Таблица3.B1" office:value-type="string">
            <text:p text:style-name="Table_20_Contents">Роль</text:p>
          </table:table-cell>
        </table:table-row>
        <table:table-row>
          <table:table-cell table:style-name="Таблица3.A2" office:value-type="string">
            <text:p text:style-name="P66">UA — (User Agent, терминал)</text:p>
          </table:table-cell>
          <table:table-cell table:style-name="Таблица3.B2" office:value-type="string">
            <text:p text:style-name="Table_20_Contents">Логическая конечная точка (программа или телефон). Делится на UAC (клиент, инициирует запросы) и UAS (сервер, отвечает на запросы).</text:p>
          </table:table-cell>
        </table:table-row>
        <table:table-row>
          <table:table-cell table:style-name="Таблица3.A2" office:value-type="string">
            <text:p text:style-name="P66">Registrar</text:p>
          </table:table-cell>
          <table:table-cell table:style-name="Таблица3.B2" office:value-type="string">
            <text:p text:style-name="Table_20_Contents"><text:span text:style-name="T43">У</text:span>зел в сети SIP, который производит регистрацию терминалов и хранит информацию о них, а также позволяет производить поиск терминалов по необходимым параметрам.</text:p>
          </table:table-cell>
        </table:table-row>
        <table:table-row>
          <table:table-cell table:style-name="Таблица3.A2" office:value-type="string">
            <text:p text:style-name="P66">Proxy Server</text:p>
          </table:table-cell>
          <table:table-cell table:style-name="Таблица3.B2" office:value-type="string">
            <text:p text:style-name="Table_20_Contents"><text:span text:style-name="T43">П</text:span>ромежуточный объект SIP-сети, обеспечивающий маршрутизацию сессий и отвечающий за доставку сообщений терминалам. Позволяет выполнять запросы от имени других узлов сети, тем самым ускоряя доставку сообщений через наиболее короткие маршруты.</text:p>
          </table:table-cell>
        </table:table-row>
        <table:table-row>
          <table:table-cell table:style-name="Таблица3.A2" office:value-type="string">
            <text:p text:style-name="P66">Gateway</text:p>
          </table:table-cell>
          <table:table-cell table:style-name="Таблица3.B2" office:value-type="string">
            <text:p text:style-name="Table_20_Contents"><text:span text:style-name="T43">П</text:span>ограничный узел, используемый для передачи сообщений между сетями.</text:p>
          </table:table-cell>
        </table:table-row>
        <table:table-row>
          <table:table-cell table:style-name="Таблица3.A2" office:value-type="string">
            <text:p text:style-name="Table_20_Contents">Session Border Controller</text:p>
          </table:table-cell>
          <table:table-cell table:style-name="Таблица3.B2" office:value-type="string">
            <text:p text:style-name="Table_20_Contents"><text:span text:style-name="T43">С</text:span>пециализированный элемент сети, служащий для выполнения сервисных функций между терминалами, такими, например, как <text:soft-page-break/>обход NAT.</text:p>
          </table:table-cell>
        </table:table-row>
        <table:table-row>
          <table:table-cell table:style-name="Таблица3.A2" office:value-type="string">
            <text:p text:style-name="Table_20_Contents">Redirect Server</text:p>
          </table:table-cell>
          <table:table-cell table:style-name="Таблица3.B2" office:value-type="string">
            <text:p text:style-name="Table_20_Contents"><text:span text:style-name="T43">В</text:span>спомогательный элемент сети, используемый для перенаправления запросов от прокси-серверов к внешним доменам.</text:p>
          </table:table-cell>
        </table:table-row>
      </table:table>
      <text:p text:style-name="P65"/>
      <text:p text:style-name="P67">Обмен сообщениями в протоколе SIP осуществляется с помощью специальных определенных в протоколе сообщений (методов). Так как протокол SIP является текстовым протоколом прикладного уровня, его синтаксис во многом схож с протоколом HTTP. Каждое сообщение в SIP разделяется на запрос и ответ, согласно представленной выше модели «клиент-сервер». Первая строка запроса содержит метод, определяющий природу запроса, затем следует URI-адрес назначения запроса. Ответ содержит в первой строке код, определяющий результат поступившего запроса. Пример сообщений между терминалом и регистратором представлен на рисунке 6:</text:p>
      <text:p text:style-name="P68"><draw:frame draw:style-name="fr1" draw:name="Изображение6" text:anchor-type="as-char" svg:width="17cm" svg:height="7.366cm" draw:z-index="5"><draw:image xlink:href="Pictures/10000001000002E700000142ACDD35BD.png" xlink:type="simple" xlink:show="embed" xlink:actuate="onLoad" draw:mime-type="image/png"/></draw:frame></text:p>
      <text:p text:style-name="P68">Рисунок 6 — Сценарий обмена сообщениями между терминалом и регистратором по протоколу SIP <text:span text:style-name="T44">[12]</text:span></text:p>
      <text:p text:style-name="P67">В SIP описаны множество процедур <text:span text:style-name="T44">(методов), посредством которых происходит общение оконечного терминала (UAC) и сервера (UAS). Они нужны для управления голосовыми и видеозвонками, сообщениями и конференциями в VoIP-телефонии. Они устанавливают, модифицируют и завершают сеансы связи через интернет, обеспечивая обмен сигналами между устройствами. [13] Примеры основных SIP методов с описанием их функций:</text:span></text:p>
      <text:list text:style-name="L6">
        <text:list-item>
          <text:p text:style-name="P69"><text:soft-page-break/>REGISTER (регистрация) — передает информацию о местоположении пользователя на сервер SIP, который может транслировать ее на сервер адресов (Location Server);</text:p>
        </text:list-item>
        <text:list-item>
          <text:p text:style-name="P69">INVITE (приглашение) - приглашает пользователя принять участие в сеансе связи (служит для установления нового соединения; может содержать параметры для согласования);</text:p>
        </text:list-item>
        <text:list-item>
          <text:p text:style-name="P69">АСК (подтверждение) — используется для подтверждения получения сообщения или для положительного ответа на команду INVITE;</text:p>
        </text:list-item>
        <text:list-item>
          <text:p text:style-name="P69">BYE (разъединение) — завершает соединение между двумя пользователями;</text:p>
        </text:list-item>
        <text:list-item>
          <text:p text:style-name="P69">CANCEL (отмена) — прекращает поиск пользователя;</text:p>
        </text:list-item>
        <text:list-item>
          <text:p text:style-name="P69">OPTIONS (опции) — используется для передачи информации о поддерживаемых характеристиках (эта передача может осуществляться напрямую между двумя агентами пользователей или через сервер SIP);</text:p>
        </text:list-item>
        <text:list-item>
          <text:p text:style-name="P69">MESSAGE <text:span text:style-name="T45">(сообщение)</text:span> — отправка текстового сообщения;</text:p>
        </text:list-item>
        <text:list-item>
          <text:p text:style-name="P69">INFO <text:span text:style-name="T46">(информация)</text:span> — информация о сеансе, без его модификации;</text:p>
        </text:list-item>
        <text:list-item>
          <text:p text:style-name="P69">UPDATE <text:span text:style-name="T46">(обновление)</text:span> — изменение состояния сеанса без изменения диалога.</text:p>
        </text:list-item>
      </text:list>
      <text:p text:style-name="P70">SIP-протокол определяет коды ответов (трехзначные числа) для информирования о результате обработки запроса, разделяя их на 6 основных классов (1xx-6xx). Первая цифра определяет класс, остальные — детализируют его. Коды включают промежуточные (1xx), успешные (2xx), переадресации (3xx), ошибки клиента (4xx), сервера (5xx) и глобальные сбои (6xx). [13]</text:p>
      <text:p text:style-name="P71">Дописать форму SIP сообщения с источником, затем сценарий с изменением вида сообщения на каждом шаге</text:p>
      <text:p text:style-name="P70">Основная задача протокола инициации сеанса <text:span text:style-name="T47">SIP заключается в создании потока мультимедийных данных (аудио, видео) между двумя или более абонентами. Стандартный сценарий для данной задачи начинается с отправки абонентом A сообщения REGISTER </text:span></text:p>
      <text:p text:style-name="P70"><text:soft-page-break/>Типичный сценарий вызова абонентом A абонента B и организации медиапотока (RTP) между ними посредством протокола SIP будет </text:p>
      <text:h text:style-name="P72" text:outline-level="1">СПИСОК ИСПОЛЬЗОВАННЫХ ИСТОЧНИКОВ</text:h>
      <text:list text:style-name="L7">
        <text:list-item>
          <text:p text:style-name="P73">Келли Т. VoIP For Dummies. — Hoboken : Wiley Publishing, 2005. — 312 с. — ISBN 978-0-7645-8843-9.</text:p>
        </text:list-item>
        <text:list-item>
          <text:p text:style-name="P73">Прохоров А. VoIP-шлюзы: аналоговый мост между мирами TDM и IP [Электронный ресурс] // Habr. — 2024. — 22 мая. — <text:span text:style-name="T27">URL</text:span>: https://habr.com/ru/articles/906802/ (дата обращения: 1<text:span text:style-name="T27">2</text:span>.04.2026).</text:p>
        </text:list-item>
        <text:list-item>
          <text:p text:style-name="P73">VoIP - что это и как используется - IP-телефония [Электронный ресурс] // VoIP.ru. – 2025. – 22 мая. – URL: https://voip.ru/voip-chto-eto-takoe/ (дата обращения: 16.04.2026).</text:p>
        </text:list-item>
        <text:list-item>
          <text:p text:style-name="P73">IP-телефония в компьютерных сетях. Лекция 1: Общие ... [Электронный ресурс] // Intuit.ru. – 2008. – 12 авг. – URL: https://intuit.ru/studies/courses/8/8/lecture/239 (дата обращения: 16.04.2026).</text:p>
        </text:list-item>
        <text:list-item>
          <text:p text:style-name="P73">Как голос передается через интернет — блог New-Tel [Электронный ресурс] // New-Tel.net. – 2026. – 30 янв. – URL: https://new-tel.net/blog/kak-golos-peredaetsya-cherez-internet/ (дата обращения: 16.04.2026).</text:p>
        </text:list-item>
        <text:list-item>
          <text:p text:style-name="P73">VoIP кодеки – подробное описание и характеристики [Электронный ресурс] // Merionet Wiki. — 2016. — 5 января. — <text:span text:style-name="T32">URL</text:span>: https://wiki.merionet.ru/articles/voip-codecs (дата обращения: 16.04.2026).</text:p>
        </text:list-item>
        <text:list-item>
          <text:p text:style-name="P73">Модель TCP/IP: что это такое и как она работает [Электронный ресурс] // Skillbox.ru. – 2023. – 25 апр. – URL: https://skillbox.ru/media/code/model-tcpip-chto-eto-takoe-i-kak-ona-rabotaet/ (дата обращения: 16.04.2026).</text:p>
        </text:list-item>
        <text:list-item>
          <text:p text:style-name="P73">Что такое MAC-адрес и как его узнать? [Электронный ресурс] // Merionet Wiki. — 2020. — 16 января. — Режим доступа: <text:a xlink:type="simple" xlink:href="https://wiki.merionet.ru/articles/chto-takoe-mac-adres-i-kak-ego-uznat" office:target-frame-name="_blank" xlink:show="new" text:style-name="Internet_20_link" text:visited-style-name="Visited_20_Internet_20_Link">https://wiki.merionet.ru/articles/chto-takoe-mac-adres-i-kak-ego-uznat</text:a> (дата обращения: 16.04.2026).</text:p>
        </text:list-item>
        <text:list-item>
          <text:p text:style-name="P73">HTTP [Электронный ресурс] // MDN Web Docs / Mozilla. — 2025. — 7 июля. — <text:span text:style-name="T38">URL</text:span>: <text:a xlink:type="simple" xlink:href="https://developer.mozilla.org/ru/docs/Web/HTTP" office:target-frame-name="_blank" xlink:show="new" text:style-name="Internet_20_link" text:visited-style-name="Visited_20_Internet_20_Link">https://developer.mozilla.org/ru/docs/Web/HTTP</text:a> (дата обращения: 16.04.2026).</text:p>
        </text:list-item>
        <text:list-item>
          <text:p text:style-name="P73"><text:soft-page-break/>Куроуз Дж., Росс К. Компьютерные сети. Нисходящий подход : пер. с англ. — М. : Эксмо, 2021. — 912 с. — ISBN 978-5-699-94358-6.</text:p>
        </text:list-item>
        <text:list-item>
          <text:p text:style-name="P73">IP-Телефония: Архитектура сети SIP [Электронный ресурс] // <text:a xlink:type="simple" xlink:href="https://IPTop.Net/" office:target-frame-name="_blank" xlink:show="new" text:style-name="Internet_20_link" text:visited-style-name="Visited_20_Internet_20_Link">IPTop.Net</text:a>. — <text:span text:style-name="T48">URL</text:span>: <text:a xlink:type="simple" xlink:href="http://iptop.net/sip/04.php" office:target-frame-name="_blank" xlink:show="new" text:style-name="Internet_20_link" text:visited-style-name="Visited_20_Internet_20_Link">http://iptop.net/sip/04.php</text:a> (дата обращения: 16.04.2026).</text:p>
        </text:list-item>
        <text:list-item>
          <text:p text:style-name="P73">Протокол SIP: инфраструктура, механизм обмена сообщениями, дополнительные возможности [Электронный ресурс] // Voxlink : база знаний. — 2020. — 9 января. — Режим доступа: <text:a xlink:type="simple" xlink:href="https://voxlink.ru/kb/asterisk-configuration/protokol-sip-infrastruktura-mehanizm-obmena-soobshhenijami-dopolnitelnye-vozmozhnosti/" office:target-frame-name="_blank" xlink:show="new" text:style-name="Internet_20_link" text:visited-style-name="Visited_20_Internet_20_Link">https://voxlink.ru/kb/asterisk-configuration/protokol-sip-infrastruktura-mehanizm-obmena-soobshhenijami-dopolnitelnye-vozmozhnosti/</text:a> (дата обращения: 16.04.2026).</text:p>
        </text:list-item>
        <text:list-item>
          <text:p text:style-name="P73">Основы IP-телефонии, базовые принципы, термины и протоколы [Электронный ресурс] // Habr. — 2013. — 13 июня. — Режим доступа: https://habr.com/ru/articles/183152/ (дата обращения: 16.04.2026).</text:p>
        </text:list-item>
        <text:list-item>
          <text:p text:style-name="P73">SIP ответы и их значения. Коды ответа и их значения в протоколе SIP [Электронный ресурс] // ProfTelecom : официальный дилер Yeastar, Yealink, Fanvil, Grandstream, SpRecord. — 2026. — 11 февраля. — Режим доступа: <text:a xlink:type="simple" xlink:href="https://proftelecom.by/SIP_kod_otvetov.htm" office:target-frame-name="_blank" xlink:show="new" text:style-name="Internet_20_link" text:visited-style-name="Visited_20_Internet_20_Link">https://proftelecom.by/SIP_kod_otvetov.htm</text:a> (дата обращения: 16.04.2026).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Жирный" style:font-family-generic="roman"/>
    <style:font-face style:name="Times new Roman" svg:font-family="'Times new Roman'" style:font-adornments="Жирный" style:font-family-generic="roman"/>
    <style:font-face style:name="Times new Roman1" svg:font-family="'Times new Roman'" style:font-adornments="Обычный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Times new Roman1" fo:font-family="'Times new Roman'" style:font-style-name="Обычный" style:font-family-generic="roman" fo:font-size="14p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false" fo:line-height="150%" fo:text-align="justify" style:justify-single-word="false" fo:text-indent="1.251cm" style:auto-text-indent="false" style:page-number="auto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 style:master-page-name="">
      <style:paragraph-properties fo:margin-left="0cm" fo:text-align="center" style:justify-single-word="false" fo:text-indent="0cm" style:auto-text-indent="false" style:page-number="auto" text:number-lines="false" text:line-number="0"/>
      <style:text-properties style:font-name="Times new Roman" fo:font-family="'Times new Roman'" style:font-style-name="Жирный" style:font-family-generic="roman" fo:font-size="14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 fo:text-align="center" style:justify-single-word="false"/>
      <style:text-properties style:font-name="Times new Roman" fo:font-family="'Times new Roman'" style:font-style-name="Жирный" style:font-family-generic="roman" fo:font-size="14pt" fo:font-weight="bold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 fo:text-align="center" style:justify-single-word="false"/>
      <style:text-properties style:font-name="Times New Roman2" fo:font-family="'Times New Roman'" style:font-style-name="Жирный" style:font-family-generic="roman" fo:font-size="14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 style:master-page-name="">
      <style:paragraph-properties fo:line-height="100%" fo:text-align="justify" style:justify-single-word="false" fo:orphans="0" fo:widows="0" style:page-number="auto" text:number-lines="false" text:line-number="0"/>
      <style:text-properties fo:font-size="1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Базовый1"/><text:page-number text:select-page="current">24</text:page-number><text:bookmark-end text:name="PageNumWizard_FOOTER_Базовый1"/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28T18:38:23.626395395</meta:creation-date>
    <dc:date>2026-04-16T16:20:07.236364369</dc:date>
    <meta:editing-duration>PT3H21M40S</meta:editing-duration>
    <meta:editing-cycles>15</meta:editing-cycles>
    <meta:generator>LibreOffice/25.2.2.2$Linux_X86_64 LibreOffice_project/520$Build-2</meta:generator>
    <meta:document-statistic meta:table-count="3" meta:image-count="6" meta:object-count="0" meta:page-count="24" meta:paragraph-count="202" meta:word-count="3783" meta:character-count="31133" meta:non-whitespace-character-count="27522"/>
  </office:meta>
</office:document-meta>
</file>