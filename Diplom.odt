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" svg:font-family="'Times new Roman'" style:font-adornments="Жирный" style:font-family-generic="roman"/>
    <style:font-face style:name="Times new Roman1" svg:font-family="'Times new Roman'" style:font-adornments="Обычный" style:font-family-generic="roman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officeooo:rsid="000032d8" officeooo:paragraph-rsid="00050e69"/>
    </style:style>
    <style:style style:name="P2" style:family="paragraph" style:parent-style-name="Standard">
      <style:paragraph-properties fo:text-align="center" style:justify-single-word="false"/>
      <style:text-properties officeooo:rsid="0003783d" officeooo:paragraph-rsid="00050e69"/>
    </style:style>
    <style:style style:name="P3" style:family="paragraph" style:parent-style-name="Standard">
      <style:paragraph-properties fo:text-align="center" style:justify-single-word="false"/>
      <style:text-properties officeooo:rsid="000032d8" officeooo:paragraph-rsid="00050e69"/>
    </style:style>
    <style:style style:name="P4" style:family="paragraph" style:parent-style-name="Standard">
      <style:paragraph-properties fo:margin-left="8.754cm" fo:text-align="justify" style:justify-single-word="false" fo:text-indent="0cm" style:auto-text-indent="false"/>
      <style:text-properties officeooo:rsid="000032d8" officeooo:paragraph-rsid="00050e69"/>
    </style:style>
    <style:style style:name="P5" style:family="paragraph" style:parent-style-name="Standard">
      <style:paragraph-properties fo:margin-left="8.754cm" fo:text-align="justify" style:justify-single-word="false" fo:text-indent="0cm" style:auto-text-indent="false"/>
      <style:text-properties officeooo:rsid="00050e69" officeooo:paragraph-rsid="00050e69"/>
    </style:style>
    <style:style style:name="P6" style:family="paragraph" style:parent-style-name="Standard">
      <style:paragraph-properties fo:text-align="end" style:justify-single-word="false"/>
      <style:text-properties officeooo:rsid="000032d8" officeooo:paragraph-rsid="00050e69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032d8" officeooo:paragraph-rsid="00050e69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normal" officeooo:rsid="000032d8" officeooo:paragraph-rsid="00050e69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left="8.754cm" fo:text-align="justify" style:justify-single-word="false" fo:text-indent="0cm" style:auto-text-indent="false"/>
      <style:text-properties fo:font-size="14pt" fo:font-weight="normal" officeooo:rsid="0005df53" officeooo:paragraph-rsid="0005df53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left="8.754cm" fo:text-align="justify" style:justify-single-word="false" fo:text-indent="0cm" style:auto-text-indent="false"/>
      <style:text-properties officeooo:rsid="00050e69" officeooo:paragraph-rsid="0005df53"/>
    </style:style>
    <style:style style:name="P11" style:family="paragraph" style:parent-style-name="Standard">
      <style:paragraph-properties fo:text-align="center" style:justify-single-word="false"/>
      <style:text-properties fo:font-size="14pt" fo:font-weight="normal" officeooo:rsid="00050e69" officeooo:paragraph-rsid="00050e69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fo:font-weight="normal" officeooo:rsid="0005df53" officeooo:paragraph-rsid="0005df53" style:font-size-asian="12.25pt" style:font-weight-asian="normal" style:font-size-complex="14pt" style:font-weight-complex="normal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break-before="page"/>
      <style:text-properties officeooo:rsid="0008c01d" officeooo:paragraph-rsid="0008c01d"/>
    </style:style>
    <style:style style:name="P17" style:family="paragraph" style:parent-style-name="Text_20_body">
      <style:text-properties officeooo:paragraph-rsid="0008c01d"/>
    </style:style>
    <style:style style:name="P18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officeooo:paragraph-rsid="000a7034" style:letter-kerning="false" style:font-name-asian="Calibri" style:font-size-asian="14pt" style:font-name-complex="Times New Roman1" style:font-size-complex="14pt"/>
    </style:style>
    <style:style style:name="P19" style:family="paragraph" style:parent-style-name="Text_20_body">
      <style:paragraph-properties fo:margin-top="0cm" fo:margin-bottom="0.499cm" style:contextual-spacing="false"/>
      <style:text-properties fo:color="#000000" loext:opacity="100%" style:font-name="Times New Roman" officeooo:paragraph-rsid="000b7d01" style:letter-kerning="false" style:font-name-asian="Calibri" style:font-size-asian="14pt" style:font-name-complex="Times New Roman1" style:font-size-complex="14pt"/>
    </style:style>
    <style:style style:name="P20" style:family="paragraph" style:parent-style-name="Text_20_body" style:list-style-name="L1">
      <style:paragraph-properties fo:margin-top="0cm" fo:margin-bottom="0.499cm" style:contextual-spacing="false"/>
      <style:text-properties officeooo:paragraph-rsid="000b7d01"/>
    </style:style>
    <style:style style:name="P21" style:family="paragraph" style:parent-style-name="Text_20_body">
      <style:paragraph-properties fo:margin-top="0cm" fo:margin-bottom="0.499cm" style:contextual-spacing="false"/>
      <style:text-properties fo:color="#000000" loext:opacity="100%" style:font-name="Times New Roman" fo:font-size="14pt" officeooo:paragraph-rsid="000b7d01" style:letter-kerning="false" style:font-name-asian="Calibri" style:font-size-asian="14pt" style:font-name-complex="Times New Roman1" style:font-size-complex="14pt"/>
    </style:style>
    <style:style style:name="P2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paragraph-rsid="000a7034"/>
    </style:style>
    <style:style style:name="P23" style:family="paragraph" style:parent-style-name="Standard" style:list-style-name="L2">
      <style:paragraph-properties fo:margin-top="0cm" fo:margin-bottom="0cm" style:contextual-spacing="false" fo:line-height="150%" fo:text-align="justify" style:justify-single-word="false"/>
      <style:text-properties officeooo:paragraph-rsid="000a7034"/>
    </style:style>
    <style:style style:name="P2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rsid="000f3aa0" officeooo:paragraph-rsid="000f3aa0"/>
    </style:style>
    <style:style style:name="P25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officeooo:paragraph-rsid="000f3aa0"/>
    </style:style>
    <style:style style:name="P26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officeooo:paragraph-rsid="00117750"/>
    </style:style>
    <style:style style:name="P27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officeooo:paragraph-rsid="001253e4"/>
    </style:style>
    <style:style style:name="P28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officeooo:rsid="001253e4" officeooo:paragraph-rsid="001253e4"/>
    </style:style>
    <style:style style:name="P29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officeooo:paragraph-rsid="0014dd63"/>
    </style:style>
    <style:style style:name="P30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paragraph-rsid="00161d50"/>
    </style:style>
    <style:style style:name="P3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paragraph-rsid="0017c8ae"/>
    </style:style>
    <style:style style:name="P3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paragraph-rsid="0019496e"/>
    </style:style>
    <style:style style:name="P3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paragraph-rsid="001ad318"/>
    </style:style>
    <style:style style:name="P34" style:family="paragraph" style:parent-style-name="Heading_20_1">
      <style:paragraph-properties fo:break-before="page"/>
    </style:style>
    <style:style style:name="T1" style:family="text">
      <style:text-properties officeooo:rsid="0003783d"/>
    </style:style>
    <style:style style:name="T2" style:family="text">
      <style:text-properties officeooo:rsid="0006ae8c"/>
    </style:style>
    <style:style style:name="T3" style:family="text">
      <style:text-properties officeooo:rsid="00050e69"/>
    </style:style>
    <style:style style:name="T4" style:family="text">
      <style:text-properties officeooo:rsid="0005df53"/>
    </style:style>
    <style:style style:name="T5" style:family="text">
      <style:text-properties officeooo:rsid="000a7034"/>
    </style:style>
    <style:style style:name="T6" style:family="text">
      <style:text-properties fo:color="#000000" loext:opacity="100%" style:font-name="Times New Roman" fo:font-size="14pt" style:letter-kerning="false" style:font-name-asian="Calibri" style:font-size-asian="14pt" style:font-name-complex="Times New Roman1" style:font-size-complex="14pt"/>
    </style:style>
    <style:style style:name="T7" style:family="text">
      <style:text-properties fo:font-size="14pt"/>
    </style:style>
    <style:style style:name="T8" style:family="text">
      <style:text-properties officeooo:rsid="000b7d01"/>
    </style:style>
    <style:style style:name="T9" style:family="text">
      <style:text-properties fo:color="#000000" loext:opacity="100%" style:font-name="Times New Roman" fo:font-size="14pt" officeooo:rsid="000b7d01" style:letter-kerning="false" style:font-name-asian="Calibri" style:font-size-asian="14pt" style:font-name-complex="Times New Roman1" style:font-size-complex="14pt"/>
    </style:style>
    <style:style style:name="T10" style:family="text">
      <style:text-properties officeooo:rsid="000d560a"/>
    </style:style>
    <style:style style:name="T11" style:family="text">
      <style:text-properties officeooo:rsid="000f3aa0"/>
    </style:style>
    <style:style style:name="T12" style:family="text">
      <style:text-properties officeooo:rsid="0011375b"/>
    </style:style>
    <style:style style:name="T13" style:family="text">
      <style:text-properties officeooo:rsid="00117750"/>
    </style:style>
    <style:style style:name="T14" style:family="text">
      <style:text-properties officeooo:rsid="001253e4"/>
    </style:style>
    <style:style style:name="T15" style:family="text">
      <style:text-properties officeooo:rsid="00147839"/>
    </style:style>
    <style:style style:name="T16" style:family="text">
      <style:text-properties officeooo:rsid="0014dd63"/>
    </style:style>
    <style:style style:name="T17" style:family="text">
      <style:text-properties officeooo:rsid="00161d50"/>
    </style:style>
    <style:style style:name="T18" style:family="text">
      <style:text-properties officeooo:rsid="00161d50" fo:background-color="#ff0000" loext:char-shading-value="0"/>
    </style:style>
    <style:style style:name="T19" style:family="text">
      <style:text-properties style:font-name="Times New Roman" fo:font-size="14pt" style:letter-kerning="false" style:font-name-asian="Times New Roman1" style:font-size-asian="14pt" style:language-asian="ru" style:country-asian="RU" style:font-name-complex="Times New Roman1" style:font-size-complex="14pt"/>
    </style:style>
    <style:style style:name="T20" style:family="text">
      <style:text-properties style:font-name="Times New Roman" fo:font-size="14pt" officeooo:rsid="00161d50" style:letter-kerning="false" style:font-name-asian="Times New Roman1" style:font-size-asian="14pt" style:language-asian="ru" style:country-asian="RU" style:font-name-complex="Times New Roman1" style:font-size-complex="14pt"/>
    </style:style>
    <style:style style:name="T21" style:family="text">
      <style:text-properties style:font-name="Times New Roman" fo:font-size="14pt" officeooo:rsid="0017c8ae" style:letter-kerning="false" style:font-name-asian="Times New Roman1" style:font-size-asian="14pt" style:language-asian="ru" style:country-asian="RU" style:font-name-complex="Times New Roman1" style:font-size-complex="14pt"/>
    </style:style>
    <style:style style:name="T22" style:family="text">
      <style:text-properties officeooo:rsid="0017c8ae"/>
    </style:style>
    <style:style style:name="T23" style:family="text">
      <style:text-properties officeooo:rsid="0019496e"/>
    </style:style>
    <style:style style:name="T24" style:family="text">
      <style:text-properties officeooo:rsid="001ad318"/>
    </style:style>
    <style:style style:name="T25" style:family="text">
      <style:text-properties officeooo:rsid="001b8bb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СибГУТИ «СИБИРСКИЙ ГОСУДАРСТВЕННЫЙ УНИВЕРСИТЕТ ТЕЛЕКОММУНИКАЦИЙ И ИНФОРМАТИКИ»</text:p>
      <text:p text:style-name="P3"/>
      <text:p text:style-name="P3">Институт: <text:span text:style-name="T1">Информатики и вычислительной техники</text:span></text:p>
      <text:p text:style-name="P3">Кафедра: <text:span text:style-name="T2">Вычислительных систем</text:span></text:p>
      <text:p text:style-name="P3"/>
      <text:p text:style-name="P3"/>
      <text:p text:style-name="P4">ДОПУСТИТЬ К ЗАЩИТЕ</text:p>
      <text:p text:style-name="P4">Заведующий кафедрой</text:p>
      <text:p text:style-name="P5">__________________ Е.Н. Перышкова</text:p>
      <text:p text:style-name="P5">__________________ 2026 г.</text:p>
      <text:p text:style-name="P6"/>
      <text:p text:style-name="P3"/>
      <text:p text:style-name="P3"/>
      <text:p text:style-name="P3">ВЫПУСКНАЯ КВАЛИФИКАЦИОННАЯ РАБОТА НА ТЕМУ:</text:p>
      <text:p text:style-name="P7">«Разработка <text:span text:style-name="T3">VoIP сервера на Erlang</text:span>»</text:p>
      <text:p text:style-name="P8"/>
      <text:p text:style-name="P8"/>
      <text:p text:style-name="P8"/>
      <text:p text:style-name="P9">Руководитель</text:p>
      <text:p text:style-name="P9">профессор кафедры ВС</text:p>
      <text:p text:style-name="P10">__________________ <text:span text:style-name="T4">М.Г. Курносов</text:span></text:p>
      <text:p text:style-name="P10">__________________ <text:span text:style-name="T4">2026 г.</text:span></text:p>
      <text:p text:style-name="P9">Автор работы</text:p>
      <text:p text:style-name="P9">студент группы ИВ-221</text:p>
      <text:p text:style-name="P10">__________________ <text:span text:style-name="T4">Е.И. Беляев</text:span></text:p>
      <text:p text:style-name="P10">__________________ <text:span text:style-name="T4">2026 г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Новосибирск 2026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13">СОДЕРЖАНИЕ</text:p>
          </text:index-title>
          <text:p text:style-name="P14"><text:a xlink:type="simple" xlink:href="#__RefHeading___Toc7047_1256723539" text:style-name="Index_20_Link" text:visited-style-name="Index_20_Link">ВВЕДЕНИЕ<text:tab/>3</text:a></text:p>
          <text:p text:style-name="P14"><text:a xlink:type="simple" xlink:href="#__RefHeading___Toc7536_1402547187" text:style-name="Index_20_Link" text:visited-style-name="Index_20_Link">1 Теоретические основы и обзор технологий<text:tab/>11</text:a></text:p>
          <text:p text:style-name="P15"><text:a xlink:type="simple" xlink:href="#__RefHeading___Toc7538_1402547187" text:style-name="Index_20_Link" text:visited-style-name="Index_20_Link">1.1 Основы VoIP и протокол SIP<text:tab/>11</text:a></text:p>
        </text:index-body>
      </text:table-of-content>
      <text:p text:style-name="P12"/>
      <text:h text:style-name="P16" text:outline-level="1"><text:bookmark-start text:name="__RefHeading___Toc7047_1256723539"/>ВВЕДЕНИЕ<text:bookmark-end text:name="__RefHeading___Toc7047_1256723539"/></text:h>
      <text:p text:style-name="P17">Голосовая и видеосвязь посредством компьютерных сетей стала популярной во всём мире с конца XX века (последней декады) и в настоящее время широко используется как частными пользователями, так и в корпоративном секторе, а также государственными органами. Применение систем IP-телефонии позволяет компаниям — операторам связи значительно снизить стоимость звонков (особенно международных) и интегрировать телефонию с сервисами Интернета, предоставлять интеллектуальные услуги.</text:p>
      <text:p text:style-name="P17">Под IP-телефонией подразумевается голосовая связь, которая осуществляется по сетям передачи данных, в частности по IP-сетям (IP — Internet Protocol). На сегодняшний день IP-телефония все больше вытесняет традиционные телефонные сети за счет легкости развертывания, низкой стоимости звонка, простоты конфигурирования, высокого качества связи и сравнительной безопасности соединения.</text:p>
      <text:p text:style-name="P17">В традиционной телефонии установка соединения происходит при помощи телефонной станции и преследует исключительно цель разговора. Здесь голосовые сигналы передаются по телефонным линиям, через выделенное подключение. В случае же IP-телефонии, сжатые пакеты данных поступают в глобальную или локальную сеть с определенным адресом и передаются на основе данного адреса. При этом используется уже IP-адресация, со всеми присущими ей особенностями (такими как маршрутизация).</text:p>
      <text:p text:style-name="P17">IP-телефония использует более общую технологию VoIP (англ. Voice over IP) для организации двустороннего общения. Технология VoIP в общем случае подразумевает все варианты передачи голоса через IP, в том числе не имеющие никакого отношения к телефонии и общению людей. Например, технология VoIP применяется для передачи звука в системах IP-видеонаблюдения, в системах оповещения, при трансляции вебинаров, при просмотре фильмов в режиме онлайн и т. п.</text:p>
      <text:p text:style-name="P17"><text:soft-page-break/><text:span text:style-name="T5">VoIP-серверы</text:span> — программные коммутаторы (софтсвитчи), IP-АТС, виртуальные АТС и серверы ВКС, а также специализированные серверы Интернет-сервисов (таких как Skype) обеспечивают пользователей возможностями голосовой и видео-связи в режиме реального времени посредством компьютерной сети. Кроме передачи потоковых медиа-данных (аудио и видео), сервер IP-телефонии подобно классической АТС реализует возможность регистрации оконечного терминала, маршрутизацию вызова и корректное установление соединения между пользователями, а также нередко и дополнительные виды обслуживания.</text:p>
      <text:p text:style-name="P18" loext:marker-style-name="T6"><text:span text:style-name="T7">Актуальность темы выпускной квалификационной работы обусловлена тем, что </text:span>на смену традиционным телекоммуникационным технологиям, основанным на TDM (Time Division Multiplexing) и выделенных каналах связи, приходят решения на базе VoIP. TDM-системы, такие как классические цифровые АТС (например, Siemens HiPath, Avaya Definity, Panasonic KX-TDA), используют физически выделенные линии (E1 потоки) с ж<text:span text:style-name="T8">ё</text:span>стким разделением временных слотов, что приводит к неэффективному использованию пропускной способности, сложности масштабирования, высоким затратам на оборудование и обслуживание, а также ограниченным возможностям интеграции с современными ИТ-сервисами.</text:p>
      <text:p text:style-name="P19">В отличие от TDM, VoIP-серверы (софтсвитчи, IP-АТС) используют уже существующую IP-инфраструктуру, позволяя объединить голосовые и данные сети, что существенно снижает капитальные и операционные затраты. Кроме того, VoIP-решения обеспечивают:</text:p>
      <text:list text:style-name="L1">
        <text:list-item>
          <text:p text:style-name="P20"><text:span text:style-name="T9">Г</text:span><text:span text:style-name="T6">ибкость масштабирования — добавление новых абонентов не требует прокладки дополнительных физических линий;</text:span></text:p>
        </text:list-item>
        <text:list-item>
          <text:p text:style-name="P20"><text:span text:style-name="T9">Г</text:span><text:span text:style-name="T6">еографическую распределенность — сотрудники могут подключаться к корпоративной АТС из любой точки мира при наличии доступа в Интернет;</text:span></text:p>
        </text:list-item>
        <text:list-item>
          <text:p text:style-name="P20"><text:soft-page-break/><text:span text:style-name="T9">И</text:span><text:span text:style-name="T6">нтеграцию с ИТ-сервисами — унифицированные коммуникации (объединение телефонии, видеосвязи, чата, электронной почты, CRM-систем);</text:span></text:p>
        </text:list-item>
        <text:list-item>
          <text:p text:style-name="P20"><text:span text:style-name="T9">Р</text:span><text:span text:style-name="T6">асширенный функционал — виртуальные номера, запись разговоров, интеллектуальная маршрутизация вызовов, контакт-центры, WebRTC и др.</text:span></text:p>
        </text:list-item>
      </text:list>
      <text:p text:style-name="P21"><text:span text:style-name="T10">Т</text:span>радиционные реализации VoIP-серверов (такие как Asterisk, FreeSWITCH и др.) написаны преимущественно на языках C/C++ и, несмотря на свою функциональную полноту, обладают рядом ограничений: монолитная архитектура, сложность горизонтального масштабирования, накладные расходы при обработке большого количества одновременных соединений, а также ограниченные возможности для горячей замены кода без остановки сервиса.</text:p>
      <text:p text:style-name="P22" loext:marker-style-name="T6">В этой связи актуальным является поиск альтернативных технологических платформ, позволяющих создавать VoIP-серверы с принципиально иными характеристиками надежности и масштабируемости. Язык программирования Erlang и платформа OTP (Open Telecom Platform), изначально разработанные компанией Ericsson для нужд телекоммуникационной отрасли, предоставляют уникальные возможности:</text:p>
      <text:list text:style-name="L2">
        <text:list-item>
          <text:p text:style-name="P23" loext:marker-style-name="T6"><text:span text:style-name="T5">Л</text:span>егковесные процессы, позволяющие одновременно обслуживать сотни тысяч соединений;</text:p>
        </text:list-item>
        <text:list-item>
          <text:p text:style-name="P23" loext:marker-style-name="T6"><text:span text:style-name="T5">М</text:span>одель акторов с передачей сообщений, исключающую проблемы синхронизации;</text:p>
        </text:list-item>
        <text:list-item>
          <text:p text:style-name="P23" loext:marker-style-name="T6"><text:span text:style-name="T5">М</text:span>еханизм супервизоров (supervision trees), обеспечивающий беспрецедентную отказоустойчивость;</text:p>
        </text:list-item>
        <text:list-item>
          <text:p text:style-name="P23" loext:marker-style-name="T6"><text:span text:style-name="T5">В</text:span>озможность горячей замены кода (hot code swapping) без остановки системы.</text:p>
        </text:list-item>
      </text:list>
      <text:p text:style-name="P22" loext:marker-style-name="T6"><text:soft-page-break/>Эти характеристики делают Erlang/OTP идеальной платформой для реализации VoIP-серверов, предъявляющих требования высокой доступности (carrier-grade).</text:p>
      <text:p text:style-name="P22" loext:marker-style-name="T6">Однако использование чистого Erlang для реализации SIP-стека (Session Initiation Protocol) с нуля сопряжено со значительными трудозатратами: требуется корректная обработка транзакционных состояний, таймеров, множества транспортов (UDP, TCP, TLS), а также парсинг сложных текстовых сообщений. В связи с этим актуальным является применение специализированного фреймворка NkSIP, который представляет собой зрелый SIP-стек, полностью реализованный на Erlang. NkSIP предоставляет разработчику высокоуровневые абстракции для создания Registrar, Proxy и B2BUA-компонентов, позволяя сосредоточиться на бизнес-логике VoIP-сервера, а не на низкоуровневых деталях протокола. При этом NkSIP наследует все преимущества Erlang/OTP: масштабируемость, отказоустойчивость и поддержку распределенных систем.</text:p>
      <text:p text:style-name="P24" loext:marker-style-name="T6">Цель работы: Спроектировать и реализовать прототип VoIP-сервера на Erlang с использованием NkSIP и Mnesia, реализующий базовую функциональность SIP Registrar и Proxy. Оставить возможность функционального масштабирования разработанной системы.</text:p>
      <text:p text:style-name="P24" loext:marker-style-name="T6">Задачи работы:</text:p>
      <text:list text:style-name="L3">
        <text:list-item>
          <text:p text:style-name="P25" loext:marker-style-name="T6"><text:span text:style-name="T11">Изучить теоретические основы VoIP и </text:span><text:span text:style-name="T12">принципы передачи голоса по IP сетям. Разобрать архитектуру протокола сигнализации SIP: основные методы (</text:span>REGISTER, INVITE, BYE, ACK, CANCEL<text:span text:style-name="T12">), коды ответов, структура сообщений. </text:span>Проанализировать роль протокола SDP для согласования медиапараметров (кодеки, IP-адреса, порты) и протокола RTP/RTCP для передачи голосового трафика.</text:p>
        </text:list-item>
        <text:list-item>
          <text:p text:style-name="P26" loext:marker-style-name="T6">Рассмотреть возможности <text:span text:style-name="T13">платформы </text:span><text:span text:style-name="T12">Erlang/OTP и фреймворка NkSIP. </text:span><text:span text:style-name="T13">Проанализировать способы поддержки о</text:span>тказоустойчивост<text:span text:style-name="T13">и, </text:span><text:soft-page-break/><text:span text:style-name="T13">отслеживания состояния, обработки SIP сигналов, а также создания распределённых систем и хранения информации в таких системах.</text:span></text:p>
        </text:list-item>
        <text:list-item>
          <text:p text:style-name="P27" loext:marker-style-name="T6"><text:span text:style-name="T14">Проанализировать архитектуру существующих VoIP-серверов (включая Asterisk как эталон) для выявления ключевых требований. Выявить сильные и слабые стороны реализации таких платформ. </text:span>Сравнить традиционные подходы к реализации VoIP-серверов (на C/C++) с подходом на базе Erlang/OTP. Сформулировать обоснование выбора Erlang/OTP и NkSIP для разработки собственного VoIP-сервера.</text:p>
        </text:list-item>
        <text:list-item>
          <text:p text:style-name="P27" loext:marker-style-name="T6"><text:span text:style-name="T14">Выработать функциональные и нефункциональные требования к разрабатываемому VoIP-серверу. </text:span>Сформулировать требования к обработке SIP-сигнализации (регистрация, аутентификация, маршрутизация вызовов), к хранению данных абонентов, к отказоустойчивости и масштабируемости системы.</text:p>
        </text:list-item>
        <text:list-item>
          <text:p text:style-name="P28" loext:marker-style-name="T6">Разработать общую архитектуру VoIP-сервера на базе Erlang/OTP с использованием фреймворка NkSIP. Определить взаимодействие компонентов системы: транспортного слоя, модуля регистрации (Registrar), модуля маршрутизации вызовов (Proxy/Call FSM) и модуля хранения данных.</text:p>
        </text:list-item>
        <text:list-item>
          <text:p text:style-name="P28" loext:marker-style-name="T6">Спроектировать структуру OTP-супервизоров для обеспечения отказоустойчивости системы. Разработать дерево супервизоров, определить стратегии перезапуска для каждого компонента. <text:span text:style-name="T15">Добавить механизм динамического добавления процессов вызовов (FSM).</text:span></text:p>
        </text:list-item>
        <text:list-item>
          <text:p text:style-name="P28" loext:marker-style-name="T6">Спроектировать схему данных для хранения информации об абонентах, регистрациях и активных вызовах в базе данных Mnesia. Определить структуры записей (record), типы хранения таблиц (ram_copies / disc_copies), а также индексы для обеспечения быстрого поиска.</text:p>
        </text:list-item>
        <text:list-item>
          <text:p text:style-name="P29" loext:marker-style-name="T6"><text:span text:style-name="T16">Настроить среду разработки: установка Erlang/OTP, системы сборки reabar3. Разобраться в методике подключения фреймворка NkSIP в </text:span><text:soft-page-break/><text:span text:style-name="T16">качестве зависимости. </text:span>Выполнить базовую настройку NkSIP-сервиса для приема SIP-сообщений по протоколу UDP на стандартном порту 5060.</text:p>
        </text:list-item>
        <text:list-item>
          <text:p text:style-name="P29" loext:marker-style-name="T6">Реализовать модуль регистрации (Registrar) на базе NkSIP <text:span text:style-name="T16">и поведения gen_server</text:span>. Обеспечить обработку REGISTER-запросов, реализовать Digest Authentication с использованием встроенных механизмов NkSIP. Реализовать сохранение регистраций в Mnesia с учетом параметра expires и автоматическое удаление просроченных записей.</text:p>
        </text:list-item>
        <text:list-item>
          <text:p text:style-name="P29" loext:marker-style-name="T6">Реализовать модуль маршрутизации вызовов (Proxy/Call FSM) на базе NkSIP и поведения gen_statem. Обеспечить обработку INVITE-запросов, аутентификацию вызывающего абонента, поиск вызываемого абонента в таблице registrations Mnesia. Реализовать проксирование SIP-сообщений между абонентами и корректное завершение вызовов (BYE, CANCEL). Обеспечить формирование SIP-ответов для негативных сценариев (404 Not Found, 408 Timeout, 486 Busy).</text:p>
        </text:list-item>
        <text:list-item>
          <text:p text:style-name="P29" loext:marker-style-name="T6">Реализовать модуль хранения данных на базе Mnesia. Определить record-структуры для таблиц users, registrations и active_calls. Реализовать создание таблиц при старте приложения с выбором соответствующих типов хранения. Разработать функции-обертки для выполнения операций добавления, обновления, поиска и удаления записей с использованием транзакций Mnesia для обеспечения атомарности.</text:p>
        </text:list-item>
        <text:list-item>
          <text:p text:style-name="P29" loext:marker-style-name="T6">Провести функциональное тестирование разработанного VoIP-сервера с использованием SIP-клиентов (Zoiper, Linphone, <text:span text:style-name="T16">Twinkle</text:span>). Проверить сценарии: регистрацию абонентов, успешное установление и завершение вызова между двумя абонентами, обработку негативных сценариев (неверный пароль, вызов незарегистрированного абонента, занятость абонента). Выполнить анализ SIP-трафика с помощью Wireshark для верификации корректности формируемых сообщений.</text:p>
        </text:list-item>
        <text:list-item>
          <text:p text:style-name="P29" loext:marker-style-name="T6"><text:soft-page-break/>Провести нагрузочное тестирование разработанного VoIP-сервера с использованием инструмента SIPp. Проанализировать поведение системы под нагрузкой (потребление CPU и памяти).</text:p>
        </text:list-item>
        <text:list-item>
          <text:p text:style-name="P29" loext:marker-style-name="T6">Провести тестирование отказоустойчивости разработанного VoIP-сервера. Смоделировать сбои отдельных компонентов и проверить корректность их перезапуска супервизорами. Убедиться, что активные вызовы не сбрасываются при перезапуске некритичных компонентов.</text:p>
        </text:list-item>
        <text:list-item>
          <text:p text:style-name="P29" loext:marker-style-name="T6">Выполнить анализ полученных результатов. Сравнить производительность и надежность разработанного VoIP-сервера с традиционными решениями (Asterisk, FreeSWITCH). Сформулировать выводы о преимуществах и недостатках подхода на базе Erlang/OTP и NkSIP. Определить направления дальнейшего развития и возможные области применения разработанного решения.</text:p>
        </text:list-item>
      </text:list>
      <text:p text:style-name="P30" loext:marker-style-name="T6"><text:span text:style-name="T17">Объект исследования: </text:span>Системы IP-телефонии.</text:p>
      <text:p text:style-name="P30" loext:marker-style-name="T6">Предмет исследования: Методы реализации VoIP сервера с использованием Erlang/OTP, NkSIP и Mnesia.</text:p>
      <text:p text:style-name="P30" loext:marker-style-name="T6">Практическая значимость: Демонстрация возможности создания легковесного, отказоустойчивого VoIP сервера на Erlang, который может быть альтернативой "тяжелым" решениям вроде Asterisk для специфических сценариев.</text:p>
      <text:p text:style-name="P30" loext:marker-style-name="T6">Структура выпускной квалификационной работы состоит из введения, трех глав, заключения, списка использованных источников в количестве <text:span text:style-name="T18">_</text:span> наименований, <text:span text:style-name="T18">_</text:span> приложения. В работе содержится <text:span text:style-name="T18">_</text:span> рисунка и <text:span text:style-name="T18">_</text:span> таблиц.</text:p>
      <text:p text:style-name="P30" loext:marker-style-name="T19"><text:span text:style-name="T19">Во введении раскрываются </text:span><text:span text:style-name="T20">стек технологий</text:span><text:span text:style-name="T19">, актуальность темы, формулируются цель, задачи, объект, предмет исследования, а также определяется практическая значимость работы.</text:span></text:p>
      <text:p text:style-name="P30" loext:marker-style-name="T19"><text:span text:style-name="T19">В первой главе рассматриваются теоретические аспекты IP-телефонии, включая принципы передачи голоса по IP-сетям, архитектуру протокола SIP, его основные методы и коды ответов, а также роль протоколов SDP и </text:span><text:soft-page-break/><text:span text:style-name="T19">RTP/RTCP. Проводится анализ платформы Erlang/OTP, </text:span><text:span text:style-name="T21">фреймворка NkSIP и существующих VoIP-серверов. </text:span>На основе проведенного анализа формулируется обоснование выбора Erlang/OTP и NkSIP для разработки собственного VoIP-сервера.</text:p>
      <text:p text:style-name="P31" loext:marker-style-name="T19"><text:span text:style-name="T22">Во второй главе </text:span>определяются функциональные и нефункциональные требования к разрабатываемому VoIP-серверу, <text:span text:style-name="T22">р</text:span>азрабатывается общая архитектура системы, <text:span text:style-name="T22">п</text:span>роектируется структура <text:span text:style-name="T22">дерева </text:span>OTP-супервизоров, <text:span text:style-name="T22">с</text:span>оздается схема конечного автомата вызова (Call FSM), <text:span text:style-name="T22">п</text:span>роектируется схема данных для хранения информации <text:span text:style-name="T22">в Mnesia.</text:span></text:p>
      <text:p text:style-name="P32" loext:marker-style-name="T19"><text:span text:style-name="T22">В третьей главе </text:span>описывается процесс реализации VoIP-сервера. Настраивается среда разработки, <text:span text:style-name="T23">р</text:span>еализуется модуль регистрации (Registrar) на базе NkSIP <text:span text:style-name="T23">и</text:span> поведения gen_s<text:span text:style-name="T23">erver</text:span>, <text:span text:style-name="T23">р</text:span>еализуется модуль маршрутизации вызовов (Proxy/Call FSM) на базе NkSIP и поведения gen_statem, <text:span text:style-name="T23">р</text:span>еализуется модуль хранения данных на базе Mnesia.</text:p>
      <text:p text:style-name="P33" loext:marker-style-name="T19">В четвертой главе описывается процесс тестирования разработанного VoIP-сервера. Проводится функциональное тестирование с использованием SIP-клиентов, <text:s/><text:span text:style-name="T24">в</text:span>ыполн<text:span text:style-name="T24">яется</text:span> анализ SIP-трафика, <text:span text:style-name="T24">п</text:span>роводится нагрузочное тестирование с использованием инструмента SIPp, <text:span text:style-name="T24">п</text:span>роводится тестирование отказоустойчивости, выполняется анализ полученных результатов.</text:p>
      <text:p text:style-name="P33" loext:marker-style-name="T19">В заключении подводятся итоги выполненной работы, формулируются основные результаты, достигнутые в ходе исследования и разработки VoIP-сервера на Erlang/OTP с использованием фреймворка NkSIP и базы данных Mnesia.</text:p>
      <text:h text:style-name="P34" text:outline-level="1"><text:bookmark-start text:name="__RefHeading___Toc7536_1402547187"/><text:span text:style-name="T25">1 </text:span>Теоретические основы и обзор технологий<text:bookmark-end text:name="__RefHeading___Toc7536_1402547187"/></text:h>
      <text:h text:style-name="Heading_20_2" text:outline-level="2"><text:bookmark-start text:name="__RefHeading___Toc7538_1402547187"/><text:span text:style-name="T25">1.1 </text:span>Основы VoIP и протокол SIP<text:bookmark-end text:name="__RefHeading___Toc7538_1402547187"/></text:h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" svg:font-family="'Times new Roman'" style:font-adornments="Жирный" style:font-family-generic="roman"/>
    <style:font-face style:name="Times new Roman1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Обычный" style:font-family-generic="roman"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align="center" style:justify-single-word="false" fo:text-indent="0cm" style:auto-text-indent="false" style:page-number="auto" text:number-lines="false" text:line-number="0"/>
      <style:text-properties style:font-name="Times new Roman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text-align="center" style:justify-single-word="false"/>
      <style:text-properties style:font-name="Times new Roman" fo:font-family="'Times new Roman'" style:font-style-name="Жирный" style:font-family-generic="roman" fo:font-size="1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 fo:text-align="center" style:justify-single-word="false"/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0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8T18:38:23.626395395</meta:creation-date>
    <dc:date>2026-04-12T18:44:04.734277795</dc:date>
    <meta:editing-duration>PT2H36M56S</meta:editing-duration>
    <meta:editing-cycles>9</meta:editing-cycles>
    <meta:generator>LibreOffice/25.2.2.2$Linux_X86_64 LibreOffice_project/520$Build-2</meta:generator>
    <meta:document-statistic meta:table-count="0" meta:image-count="0" meta:object-count="0" meta:page-count="11" meta:paragraph-count="73" meta:word-count="1586" meta:character-count="13828" meta:non-whitespace-character-count="12330"/>
  </office:meta>
</office:document-meta>
</file>